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IBM Plex Sans" svg:font-family="IBM Plex San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38in solid #252527" fo:border-right="none" fo:padding-top="0in" fo:padding-left="0in" fo:padding-bottom="0.0833in" fo:padding-right="0in" style:shadow="none" fo:margin-bottom="0.1666in" fo:line-height="100%" fo:background-color="#222223">
        <style:background-fill draw:fill="solid" draw:fill-color="#222223"/>
      </style:paragraph-properties>
    </style:style>
    <style:style style:name="T2" style:parent-style-name="Policepardéfaut" style:family="text">
      <style:text-properties style:font-name="Segoe UI Emoji" style:font-name-asian="Times New Roman" style:font-name-complex="Segoe UI Emoji" fo:color="#EDEDEE" style:letter-kerning="true" fo:font-size="24pt" style:font-size-asian="24pt" style:font-size-complex="24pt" style:language-asian="fr" style:country-asian="FR"/>
    </style:style>
    <style:style style:name="T3" style:parent-style-name="Policepardéfaut" style:family="text">
      <style:text-properties style:font-name="IBM Plex Sans" style:font-name-asian="Times New Roman" style:font-name-complex="Times New Roman" fo:color="#EDEDEE" style:letter-kerning="true" fo:font-size="24pt" style:font-size-asian="24pt" style:font-size-complex="24pt" style:language-asian="fr" style:country-asian="FR"/>
    </style:style>
    <style:style style:name="P4" style:parent-style-name="Normal" style:family="paragraph">
      <style:paragraph-properties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D5D6D7" style:letter-kerning="false" fo:font-size="10.5pt" style:font-size-asian="10.5pt" style:font-size-complex="10.5pt" style:language-asian="fr" style:country-asian="FR"/>
    </style:style>
    <style:style style:name="P5" style:parent-style-name="Normal" style:family="paragraph">
      <style:paragraph-properties fo:margin-top="0.25in" fo:margin-bottom="0.25in" fo:line-height="100%"/>
    </style:style>
    <style:style style:name="T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7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8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9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0" style:parent-style-name="Normal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top="0.25in" fo:margin-bottom="0.25in" fo:line-height="100%"/>
    </style:style>
    <style:style style:name="T1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7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8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ableColumn20" style:family="table-column">
      <style:table-column-properties style:column-width="2.268in"/>
    </style:style>
    <style:style style:name="TableColumn21" style:family="table-column">
      <style:table-column-properties style:column-width="6.4819in"/>
    </style:style>
    <style:style style:name="Table19" style:family="table">
      <style:table-properties style:width="8.7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24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2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26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27" style:family="table-row">
      <style:table-row-properties/>
    </style:style>
    <style:style style:name="TableCell2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2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Row32" style:family="table-row">
      <style:table-row-properties/>
    </style:style>
    <style:style style:name="TableCell3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3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3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3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Row37" style:family="table-row">
      <style:table-row-properties/>
    </style:style>
    <style:style style:name="TableCell3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3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Row42" style:family="table-row">
      <style:table-row-properties/>
    </style:style>
    <style:style style:name="TableCell4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7" style:family="table-row">
      <style:table-row-properties/>
    </style:style>
    <style:style style:name="TableCell4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2" style:family="table-row">
      <style:table-row-properties/>
    </style:style>
    <style:style style:name="TableCell5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Row57" style:family="table-row">
      <style:table-row-properties/>
    </style:style>
    <style:style style:name="TableCell5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2" style:family="table-row">
      <style:table-row-properties/>
    </style:style>
    <style:style style:name="TableCell6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Row67" style:family="table-row">
      <style:table-row-properties/>
    </style:style>
    <style:style style:name="TableCell6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2" style:family="table-row">
      <style:table-row-properties/>
    </style:style>
    <style:style style:name="TableCell7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77" style:parent-style-name="Normal" style:family="paragraph">
      <style:paragraph-properties fo:margin-top="0.25in" fo:margin-bottom="0.25in" fo:line-height="100%"/>
    </style:style>
    <style:style style:name="T7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79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80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81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8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6" style:parent-style-name="Normal" style:family="paragraph">
      <style:paragraph-properties fo:margin-top="0.25in" fo:margin-bottom="0.25in" fo:line-height="100%"/>
    </style:style>
    <style:style style:name="T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98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bottom="0in" fo:line-height="100%" fo:background-color="#222223">
        <style:background-fill draw:fill="solid" draw:fill-color="#222223"/>
      </style:paragraph-properties>
    </style:style>
    <style:style style:name="T99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00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10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P10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3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2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8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3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P13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4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42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P14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4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P14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4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5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52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P15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5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P15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5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62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6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6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65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6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7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71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7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7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7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7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8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8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8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8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8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8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8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9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9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92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9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9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9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97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19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99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0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0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0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20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0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0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21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1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1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1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1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19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21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2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2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28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2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3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3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33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3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3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3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3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3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4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4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42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4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4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45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4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4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4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4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5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5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52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5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5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5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6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6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64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6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6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6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6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73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7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7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76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7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7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7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8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81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8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83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8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8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8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8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88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8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90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9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9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9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29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95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29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297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29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29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0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0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0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0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0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1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1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1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1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urier New" style:font-name-asian="Times New Roman" style:font-name-complex="Courier New" fo:color="#C4E581" style:letter-kerning="fals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urier New" style:font-name-asian="Times New Roman" style:font-name-complex="Courier New" fo:color="#C4E581" style:letter-kerning="false" fo:font-size="10.5pt" style:font-size-asian="10.5pt" style:font-size-complex="10.5pt" style:language-asian="fr" style:country-asian="FR"/>
    </style:style>
    <style:style style:name="T32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2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urier New" style:font-name-asian="Times New Roman" style:font-name-complex="Courier New" fo:color="#C4E581" style:letter-kerning="false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3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urier New" style:font-name-asian="Times New Roman" style:font-name-complex="Courier New" fo:color="#C4E581" style:letter-kerning="false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3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urier New" style:font-name-asian="Times New Roman" style:font-name-complex="Courier New" fo:color="#C4E581" style:letter-kerning="false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3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3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4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4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4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4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45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4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47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4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4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5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5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5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5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6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6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6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6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69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7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7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76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7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7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38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83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38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385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38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387" style:parent-style-name="Normal" style:family="paragraph">
      <style:paragraph-properties fo:margin-top="0.25in" fo:margin-bottom="0.25in" fo:line-height="100%"/>
    </style:style>
    <style:style style:name="T3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89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390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391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ableColumn393" style:family="table-column">
      <style:table-column-properties style:column-width="2.3833in"/>
    </style:style>
    <style:style style:name="TableColumn394" style:family="table-column">
      <style:table-column-properties style:column-width="2.5388in"/>
    </style:style>
    <style:style style:name="TableColumn395" style:family="table-column">
      <style:table-column-properties style:column-width="2.5625in"/>
    </style:style>
    <style:style style:name="TableColumn396" style:family="table-column">
      <style:table-column-properties style:column-width="1.2652in"/>
    </style:style>
    <style:style style:name="Table392" style:family="table">
      <style:table-properties style:width="8.75in" fo:margin-left="0in" table:align="left"/>
    </style:style>
    <style:style style:name="TableRow397" style:family="table-row">
      <style:table-row-properties/>
    </style:style>
    <style:style style:name="TableCell39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399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0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01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0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03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0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05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06" style:family="table-row">
      <style:table-row-properties/>
    </style:style>
    <style:style style:name="TableCell40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08" style:parent-style-name="Normal" style:family="paragraph">
      <style:paragraph-properties fo:margin-bottom="0in" fo:line-height="100%"/>
    </style:style>
    <style:style style:name="T40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1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1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1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1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1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1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16" style:family="table-row">
      <style:table-row-properties/>
    </style:style>
    <style:style style:name="TableCell41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18" style:parent-style-name="Normal" style:family="paragraph">
      <style:paragraph-properties fo:margin-bottom="0in" fo:line-height="100%"/>
    </style:style>
    <style:style style:name="T41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2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2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2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2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2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26" style:family="table-row">
      <style:table-row-properties/>
    </style:style>
    <style:style style:name="TableCell4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28" style:parent-style-name="Normal" style:family="paragraph">
      <style:paragraph-properties fo:margin-bottom="0in" fo:line-height="100%"/>
    </style:style>
    <style:style style:name="T42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3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3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3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36" style:family="table-row">
      <style:table-row-properties/>
    </style:style>
    <style:style style:name="TableCell43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38" style:parent-style-name="Normal" style:family="paragraph">
      <style:paragraph-properties fo:margin-bottom="0in" fo:line-height="100%"/>
    </style:style>
    <style:style style:name="T43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4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4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4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4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4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46" style:family="table-row">
      <style:table-row-properties/>
    </style:style>
    <style:style style:name="TableCell44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48" style:parent-style-name="Normal" style:family="paragraph">
      <style:paragraph-properties fo:margin-bottom="0in" fo:line-height="100%"/>
    </style:style>
    <style:style style:name="T4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5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5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5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5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5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56" style:family="table-row">
      <style:table-row-properties/>
    </style:style>
    <style:style style:name="TableCell45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58" style:parent-style-name="Normal" style:family="paragraph">
      <style:paragraph-properties fo:margin-bottom="0in" fo:line-height="100%"/>
    </style:style>
    <style:style style:name="T45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6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66" style:family="table-row">
      <style:table-row-properties/>
    </style:style>
    <style:style style:name="TableCell4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68" style:parent-style-name="Normal" style:family="paragraph">
      <style:paragraph-properties fo:margin-bottom="0in" fo:line-height="100%"/>
    </style:style>
    <style:style style:name="T46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7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7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7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7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76" style:family="table-row">
      <style:table-row-properties/>
    </style:style>
    <style:style style:name="TableCell47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78" style:parent-style-name="Normal" style:family="paragraph">
      <style:paragraph-properties fo:margin-bottom="0in" fo:line-height="100%"/>
    </style:style>
    <style:style style:name="T47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8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8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8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8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8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8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86" style:family="table-row">
      <style:table-row-properties/>
    </style:style>
    <style:style style:name="TableCell48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88" style:parent-style-name="Normal" style:family="paragraph">
      <style:paragraph-properties fo:margin-bottom="0in" fo:line-height="100%"/>
    </style:style>
    <style:style style:name="T48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4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9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9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49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49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496" style:family="table-row">
      <style:table-row-properties/>
    </style:style>
    <style:style style:name="TableCell49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498" style:parent-style-name="Normal" style:family="paragraph">
      <style:paragraph-properties fo:margin-bottom="0in" fo:line-height="100%"/>
    </style:style>
    <style:style style:name="T49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0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0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0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0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0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06" style:family="table-row">
      <style:table-row-properties/>
    </style:style>
    <style:style style:name="TableCell50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08" style:parent-style-name="Normal" style:family="paragraph">
      <style:paragraph-properties fo:margin-bottom="0in" fo:line-height="100%"/>
    </style:style>
    <style:style style:name="T50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1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1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1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1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1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1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16" style:family="table-row">
      <style:table-row-properties/>
    </style:style>
    <style:style style:name="TableCell51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18" style:parent-style-name="Normal" style:family="paragraph">
      <style:paragraph-properties fo:margin-bottom="0in" fo:line-height="100%"/>
    </style:style>
    <style:style style:name="T51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2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2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2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2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2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26" style:family="table-row">
      <style:table-row-properties/>
    </style:style>
    <style:style style:name="TableCell5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28" style:parent-style-name="Normal" style:family="paragraph">
      <style:paragraph-properties fo:margin-bottom="0in" fo:line-height="100%"/>
    </style:style>
    <style:style style:name="T52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3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3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3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36" style:family="table-row">
      <style:table-row-properties/>
    </style:style>
    <style:style style:name="TableCell53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38" style:parent-style-name="Normal" style:family="paragraph">
      <style:paragraph-properties fo:margin-bottom="0in" fo:line-height="100%"/>
    </style:style>
    <style:style style:name="T53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4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4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4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4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4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46" style:family="table-row">
      <style:table-row-properties/>
    </style:style>
    <style:style style:name="TableCell54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48" style:parent-style-name="Normal" style:family="paragraph">
      <style:paragraph-properties fo:margin-bottom="0in" fo:line-height="100%"/>
    </style:style>
    <style:style style:name="T5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5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5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5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5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5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56" style:family="table-row">
      <style:table-row-properties/>
    </style:style>
    <style:style style:name="TableCell55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58" style:parent-style-name="Normal" style:family="paragraph">
      <style:paragraph-properties fo:margin-bottom="0in" fo:line-height="100%"/>
    </style:style>
    <style:style style:name="T55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6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66" style:family="table-row">
      <style:table-row-properties/>
    </style:style>
    <style:style style:name="TableCell5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68" style:parent-style-name="Normal" style:family="paragraph">
      <style:paragraph-properties fo:margin-bottom="0in" fo:line-height="100%"/>
    </style:style>
    <style:style style:name="T56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7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7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7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7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76" style:family="table-row">
      <style:table-row-properties/>
    </style:style>
    <style:style style:name="TableCell57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78" style:parent-style-name="Normal" style:family="paragraph">
      <style:paragraph-properties fo:margin-bottom="0in" fo:line-height="100%"/>
    </style:style>
    <style:style style:name="T57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8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8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8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8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8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8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86" style:family="table-row">
      <style:table-row-properties/>
    </style:style>
    <style:style style:name="TableCell58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88" style:parent-style-name="Normal" style:family="paragraph">
      <style:paragraph-properties fo:margin-bottom="0in" fo:line-height="100%"/>
    </style:style>
    <style:style style:name="T58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5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9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9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59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59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596" style:family="table-row">
      <style:table-row-properties/>
    </style:style>
    <style:style style:name="TableCell59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598" style:parent-style-name="Normal" style:family="paragraph">
      <style:paragraph-properties fo:margin-bottom="0in" fo:line-height="100%"/>
    </style:style>
    <style:style style:name="T59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0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0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0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0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0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06" style:family="table-row">
      <style:table-row-properties/>
    </style:style>
    <style:style style:name="TableCell60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08" style:parent-style-name="Normal" style:family="paragraph">
      <style:paragraph-properties fo:margin-bottom="0in" fo:line-height="100%"/>
    </style:style>
    <style:style style:name="T60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1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1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1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1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1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1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16" style:family="table-row">
      <style:table-row-properties/>
    </style:style>
    <style:style style:name="TableCell61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18" style:parent-style-name="Normal" style:family="paragraph">
      <style:paragraph-properties fo:margin-bottom="0in" fo:line-height="100%"/>
    </style:style>
    <style:style style:name="T61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2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2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2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2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2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26" style:family="table-row">
      <style:table-row-properties/>
    </style:style>
    <style:style style:name="TableCell6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28" style:parent-style-name="Normal" style:family="paragraph">
      <style:paragraph-properties fo:margin-bottom="0in" fo:line-height="100%"/>
    </style:style>
    <style:style style:name="T62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3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3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3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36" style:family="table-row">
      <style:table-row-properties/>
    </style:style>
    <style:style style:name="TableCell63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38" style:parent-style-name="Normal" style:family="paragraph">
      <style:paragraph-properties fo:margin-bottom="0in" fo:line-height="100%"/>
    </style:style>
    <style:style style:name="T63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4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4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4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4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4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46" style:family="table-row">
      <style:table-row-properties/>
    </style:style>
    <style:style style:name="TableCell64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48" style:parent-style-name="Normal" style:family="paragraph">
      <style:paragraph-properties fo:margin-bottom="0in" fo:line-height="100%"/>
    </style:style>
    <style:style style:name="T6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5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5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5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5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5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56" style:family="table-row">
      <style:table-row-properties/>
    </style:style>
    <style:style style:name="TableCell65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58" style:parent-style-name="Normal" style:family="paragraph">
      <style:paragraph-properties fo:margin-bottom="0in" fo:line-height="100%"/>
    </style:style>
    <style:style style:name="T65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6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66" style:family="table-row">
      <style:table-row-properties/>
    </style:style>
    <style:style style:name="TableCell6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68" style:parent-style-name="Normal" style:family="paragraph">
      <style:paragraph-properties fo:margin-bottom="0in" fo:line-height="100%"/>
    </style:style>
    <style:style style:name="T66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7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7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7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7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76" style:family="table-row">
      <style:table-row-properties/>
    </style:style>
    <style:style style:name="TableCell67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78" style:parent-style-name="Normal" style:family="paragraph">
      <style:paragraph-properties fo:margin-bottom="0in" fo:line-height="100%"/>
    </style:style>
    <style:style style:name="T67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8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8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8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8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8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8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86" style:family="table-row">
      <style:table-row-properties/>
    </style:style>
    <style:style style:name="TableCell68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88" style:parent-style-name="Normal" style:family="paragraph">
      <style:paragraph-properties fo:margin-bottom="0in" fo:line-height="100%"/>
    </style:style>
    <style:style style:name="T68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6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9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9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69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69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696" style:family="table-row">
      <style:table-row-properties/>
    </style:style>
    <style:style style:name="TableCell69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698" style:parent-style-name="Normal" style:family="paragraph">
      <style:paragraph-properties fo:margin-bottom="0in" fo:line-height="100%"/>
    </style:style>
    <style:style style:name="T69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0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0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0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0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0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06" style:family="table-row">
      <style:table-row-properties/>
    </style:style>
    <style:style style:name="TableCell70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08" style:parent-style-name="Normal" style:family="paragraph">
      <style:paragraph-properties fo:margin-bottom="0in" fo:line-height="100%"/>
    </style:style>
    <style:style style:name="T70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1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1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1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1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1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1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16" style:family="table-row">
      <style:table-row-properties/>
    </style:style>
    <style:style style:name="TableCell71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18" style:parent-style-name="Normal" style:family="paragraph">
      <style:paragraph-properties fo:margin-bottom="0in" fo:line-height="100%"/>
    </style:style>
    <style:style style:name="T71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2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2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2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2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2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26" style:family="table-row">
      <style:table-row-properties/>
    </style:style>
    <style:style style:name="TableCell7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28" style:parent-style-name="Normal" style:family="paragraph">
      <style:paragraph-properties fo:margin-bottom="0in" fo:line-height="100%"/>
    </style:style>
    <style:style style:name="T72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3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3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3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36" style:family="table-row">
      <style:table-row-properties/>
    </style:style>
    <style:style style:name="TableCell73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38" style:parent-style-name="Normal" style:family="paragraph">
      <style:paragraph-properties fo:margin-bottom="0in" fo:line-height="100%"/>
    </style:style>
    <style:style style:name="T73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4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4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4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4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4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46" style:family="table-row">
      <style:table-row-properties/>
    </style:style>
    <style:style style:name="TableCell74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48" style:parent-style-name="Normal" style:family="paragraph">
      <style:paragraph-properties fo:margin-bottom="0in" fo:line-height="100%"/>
    </style:style>
    <style:style style:name="T7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5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5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5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5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5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56" style:family="table-row">
      <style:table-row-properties/>
    </style:style>
    <style:style style:name="TableCell75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58" style:parent-style-name="Normal" style:family="paragraph">
      <style:paragraph-properties fo:margin-bottom="0in" fo:line-height="100%"/>
    </style:style>
    <style:style style:name="T75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6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66" style:family="table-row">
      <style:table-row-properties/>
    </style:style>
    <style:style style:name="TableCell7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68" style:parent-style-name="Normal" style:family="paragraph">
      <style:paragraph-properties fo:margin-bottom="0in" fo:line-height="100%"/>
    </style:style>
    <style:style style:name="T76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7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7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7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7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76" style:family="table-row">
      <style:table-row-properties/>
    </style:style>
    <style:style style:name="TableCell77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78" style:parent-style-name="Normal" style:family="paragraph">
      <style:paragraph-properties fo:margin-bottom="0in" fo:line-height="100%"/>
    </style:style>
    <style:style style:name="T77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8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8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8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8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8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8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86" style:family="table-row">
      <style:table-row-properties/>
    </style:style>
    <style:style style:name="TableCell78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88" style:parent-style-name="Normal" style:family="paragraph">
      <style:paragraph-properties fo:margin-bottom="0in" fo:line-height="100%"/>
    </style:style>
    <style:style style:name="T78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7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9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9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79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79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796" style:family="table-row">
      <style:table-row-properties/>
    </style:style>
    <style:style style:name="TableCell79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798" style:parent-style-name="Normal" style:family="paragraph">
      <style:paragraph-properties fo:margin-bottom="0in" fo:line-height="100%"/>
    </style:style>
    <style:style style:name="T79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0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0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0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0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0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806" style:parent-style-name="Normal" style:family="paragraph">
      <style:paragraph-properties fo:margin-top="0.25in" fo:margin-bottom="0.25in" fo:line-height="100%"/>
    </style:style>
    <style:style style:name="T8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808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809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810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811" style:parent-style-name="Normal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812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81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814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TableColumn816" style:family="table-column">
      <style:table-column-properties style:column-width="1.1875in"/>
    </style:style>
    <style:style style:name="TableColumn817" style:family="table-column">
      <style:table-column-properties style:column-width="1.9576in"/>
    </style:style>
    <style:style style:name="TableColumn818" style:family="table-column">
      <style:table-column-properties style:column-width="5.6048in"/>
    </style:style>
    <style:style style:name="Table815" style:family="table">
      <style:table-properties style:width="8.75in" fo:margin-left="0in" table:align="left"/>
    </style:style>
    <style:style style:name="TableRow819" style:family="table-row">
      <style:table-row-properties/>
    </style:style>
    <style:style style:name="TableCell82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21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2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23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2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25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826" style:family="table-row">
      <style:table-row-properties/>
    </style:style>
    <style:style style:name="TableCell8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28" style:parent-style-name="Normal" style:family="paragraph">
      <style:paragraph-properties fo:margin-bottom="0in" fo:line-height="100%"/>
    </style:style>
    <style:style style:name="T82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3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834" style:family="table-row">
      <style:table-row-properties/>
    </style:style>
    <style:style style:name="TableCell83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36" style:parent-style-name="Normal" style:family="paragraph">
      <style:paragraph-properties fo:margin-bottom="0in" fo:line-height="100%"/>
    </style:style>
    <style:style style:name="T83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3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3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4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4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842" style:family="table-row">
      <style:table-row-properties/>
    </style:style>
    <style:style style:name="TableCell84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44" style:parent-style-name="Normal" style:family="paragraph">
      <style:paragraph-properties fo:margin-bottom="0in" fo:line-height="100%"/>
    </style:style>
    <style:style style:name="T84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4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4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4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4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850" style:family="table-row">
      <style:table-row-properties/>
    </style:style>
    <style:style style:name="TableCell851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52" style:parent-style-name="Normal" style:family="paragraph">
      <style:paragraph-properties fo:margin-bottom="0in" fo:line-height="100%"/>
    </style:style>
    <style:style style:name="T85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5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5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5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85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858" style:family="table-row">
      <style:table-row-properties/>
    </style:style>
    <style:style style:name="TableCell85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60" style:parent-style-name="Normal" style:family="paragraph">
      <style:paragraph-properties fo:margin-bottom="0in" fo:line-height="100%"/>
    </style:style>
    <style:style style:name="T86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86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86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8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866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86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68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6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7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7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7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7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7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87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76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7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7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7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8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88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82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8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8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8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8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88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8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8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9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89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92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9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89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89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9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89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898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style:language-asian="fr" style:country-asian="FR"/>
    </style:style>
    <style:style style:name="T89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0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0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90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0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90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05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90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0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90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09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91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1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91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13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91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1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91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1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91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1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92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921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92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2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24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TableColumn926" style:family="table-column">
      <style:table-column-properties style:column-width="1.4083in"/>
    </style:style>
    <style:style style:name="TableColumn927" style:family="table-column">
      <style:table-column-properties style:column-width="2.9173in"/>
    </style:style>
    <style:style style:name="TableColumn928" style:family="table-column">
      <style:table-column-properties style:column-width="4.4243in"/>
    </style:style>
    <style:style style:name="Table925" style:family="table">
      <style:table-properties style:width="8.75in" fo:margin-left="0in" table:align="left"/>
    </style:style>
    <style:style style:name="TableRow929" style:family="table-row">
      <style:table-row-properties/>
    </style:style>
    <style:style style:name="TableCell9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31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33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3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35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36" style:family="table-row">
      <style:table-row-properties/>
    </style:style>
    <style:style style:name="TableCell93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3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3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4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4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4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43" style:family="table-row">
      <style:table-row-properties/>
    </style:style>
    <style:style style:name="TableCell94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4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4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4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4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4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50" style:family="table-row">
      <style:table-row-properties/>
    </style:style>
    <style:style style:name="TableCell95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5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5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5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5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5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57" style:family="table-row">
      <style:table-row-properties/>
    </style:style>
    <style:style style:name="TableCell95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5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64" style:family="table-row">
      <style:table-row-properties/>
    </style:style>
    <style:style style:name="TableCell96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6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6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6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7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71" style:family="table-row">
      <style:table-row-properties/>
    </style:style>
    <style:style style:name="TableCell97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7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7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97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978" style:family="table-row">
      <style:table-row-properties/>
    </style:style>
    <style:style style:name="TableCell97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8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8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8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98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98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985" style:parent-style-name="Normal" style:family="paragraph">
      <style:paragraph-properties fo:margin-top="0.25in" fo:margin-bottom="0.25in" fo:line-height="100%"/>
    </style:style>
    <style:style style:name="T9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987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988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989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99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99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000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TableColumn1002" style:family="table-column">
      <style:table-column-properties style:column-width="1.2395in"/>
    </style:style>
    <style:style style:name="TableColumn1003" style:family="table-column">
      <style:table-column-properties style:column-width="4.2861in"/>
    </style:style>
    <style:style style:name="TableColumn1004" style:family="table-column">
      <style:table-column-properties style:column-width="3.2243in"/>
    </style:style>
    <style:style style:name="Table1001" style:family="table">
      <style:table-properties style:width="8.75in" fo:margin-left="0in" table:align="left"/>
    </style:style>
    <style:style style:name="TableRow1005" style:family="table-row">
      <style:table-row-properties/>
    </style:style>
    <style:style style:name="TableCell100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07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0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09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1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11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012" style:family="table-row">
      <style:table-row-properties/>
    </style:style>
    <style:style style:name="TableCell101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1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1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1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1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1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019" style:family="table-row">
      <style:table-row-properties/>
    </style:style>
    <style:style style:name="TableCell102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2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2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2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2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026" style:family="table-row">
      <style:table-row-properties/>
    </style:style>
    <style:style style:name="TableCell10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2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2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3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3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3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033" style:family="table-row">
      <style:table-row-properties/>
    </style:style>
    <style:style style:name="TableCell103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3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3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3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3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03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040" style:family="table-row">
      <style:table-row-properties/>
    </style:style>
    <style:style style:name="TableCell104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4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4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4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04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04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047" style:parent-style-name="Normal" style:family="paragraph">
      <style:paragraph-properties fo:margin-top="0.25in" fo:margin-bottom="0.25in" fo:line-height="100%"/>
    </style:style>
    <style:style style:name="T10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49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050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051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05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53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05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55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fo:language="en" fo:country="US" style:language-asian="fr" style:country-asian="FR"/>
    </style:style>
    <style:style style:name="T105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5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05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05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6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61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06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63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fo:language="en" fo:country="US" style:language-asian="fr" style:country-asian="FR"/>
    </style:style>
    <style:style style:name="T106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65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fo:language="en" fo:country="US" style:language-asian="fr" style:country-asian="FR"/>
    </style:style>
    <style:style style:name="P106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6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6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06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70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fo:language="en" fo:country="US" style:language-asian="fr" style:country-asian="FR"/>
    </style:style>
    <style:style style:name="T107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72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fo:language="en" fo:country="US" style:language-asian="fr" style:country-asian="FR"/>
    </style:style>
    <style:style style:name="P1073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7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075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07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77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07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79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08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8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8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08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84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08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86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08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8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8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09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91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09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93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09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9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96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097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09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099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0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01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0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03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10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10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0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0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08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0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10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111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112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13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14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15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1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17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11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11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2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2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22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2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24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125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126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27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style:language-asian="fr" style:country-asian="FR"/>
    </style:style>
    <style:style style:name="T1128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29" style:parent-style-name="Policepardéfaut" style:family="text">
      <style:text-properties style:font-name="Courier New" style:font-name-asian="Times New Roman" style:font-name-complex="Courier New" fo:color="#FFBD7A" style:letter-kerning="false" fo:font-size="10.5pt" style:font-size-asian="10.5pt" style:font-size-complex="10.5pt" style:language-asian="fr" style:country-asian="FR"/>
    </style:style>
    <style:style style:name="T1130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T1131" style:parent-style-name="Policepardéfaut" style:family="text">
      <style:text-properties style:font-name="Courier New" style:font-name-asian="Times New Roman" style:font-name-complex="Courier New" fo:color="#009118" style:letter-kerning="false" fo:font-size="10.5pt" style:font-size-asian="10.5pt" style:font-size-complex="10.5pt" style:language-asian="fr" style:country-asian="FR"/>
    </style:style>
    <style:style style:name="P113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133" style:parent-style-name="Normal" style:family="paragraph">
      <style:paragraph-properties fo:margin-top="0.25in" fo:margin-bottom="0.25in" fo:line-height="100%"/>
    </style:style>
    <style:style style:name="T113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35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136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137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138" style:parent-style-name="Normal" style:family="paragraph">
      <style:paragraph-properties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olumn1140" style:family="table-column">
      <style:table-column-properties style:column-width="1.5083in"/>
    </style:style>
    <style:style style:name="TableColumn1141" style:family="table-column">
      <style:table-column-properties style:column-width="1.4555in"/>
    </style:style>
    <style:style style:name="TableColumn1142" style:family="table-column">
      <style:table-column-properties style:column-width="1.5611in"/>
    </style:style>
    <style:style style:name="TableColumn1143" style:family="table-column">
      <style:table-column-properties style:column-width="2.0402in"/>
    </style:style>
    <style:style style:name="TableColumn1144" style:family="table-column">
      <style:table-column-properties style:column-width="2.1847in"/>
    </style:style>
    <style:style style:name="Table1139" style:family="table">
      <style:table-properties style:width="8.75in" fo:margin-left="0in" table:align="left"/>
    </style:style>
    <style:style style:name="TableRow1145" style:family="table-row">
      <style:table-row-properties/>
    </style:style>
    <style:style style:name="TableCell114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47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4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49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5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51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5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53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5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55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156" style:family="table-row">
      <style:table-row-properties/>
    </style:style>
    <style:style style:name="TableCell115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58" style:parent-style-name="Normal" style:family="paragraph">
      <style:paragraph-properties fo:margin-bottom="0in" fo:line-height="100%"/>
    </style:style>
    <style:style style:name="T115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16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6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6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6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6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168" style:family="table-row">
      <style:table-row-properties/>
    </style:style>
    <style:style style:name="TableCell1169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70" style:parent-style-name="Normal" style:family="paragraph">
      <style:paragraph-properties fo:margin-bottom="0in" fo:line-height="100%"/>
    </style:style>
    <style:style style:name="T117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17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7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7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7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7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7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7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7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180" style:family="table-row">
      <style:table-row-properties/>
    </style:style>
    <style:style style:name="TableCell118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82" style:parent-style-name="Normal" style:family="paragraph">
      <style:paragraph-properties fo:margin-bottom="0in" fo:line-height="100%"/>
    </style:style>
    <style:style style:name="T118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18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8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8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8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8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8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1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192" style:family="table-row">
      <style:table-row-properties/>
    </style:style>
    <style:style style:name="TableCell119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94" style:parent-style-name="Normal" style:family="paragraph">
      <style:paragraph-properties fo:margin-bottom="0in" fo:line-height="100%"/>
    </style:style>
    <style:style style:name="T119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196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9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198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19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20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2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20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203" style:parent-style-name="Normal" style:family="paragraph">
      <style:paragraph-properties fo:margin-bottom="0in" fo:line-height="100%"/>
    </style:style>
    <style:style style:name="T120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05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20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07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20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09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ableRow1210" style:family="table-row">
      <style:table-row-properties/>
    </style:style>
    <style:style style:name="TableCell121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212" style:parent-style-name="Normal" style:family="paragraph">
      <style:paragraph-properties fo:margin-bottom="0in" fo:line-height="100%"/>
    </style:style>
    <style:style style:name="T121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21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21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21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217" style:parent-style-name="Normal" style:family="paragraph">
      <style:paragraph-properties fo:margin-bottom="0in" fo:line-height="100%"/>
    </style:style>
    <style:style style:name="T121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19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22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22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222" style:parent-style-name="Normal" style:family="paragraph">
      <style:paragraph-properties fo:margin-bottom="0in" fo:line-height="100%"/>
    </style:style>
    <style:style style:name="T122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224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225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22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22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228" style:parent-style-name="Normal" style:family="paragraph">
      <style:paragraph-properties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229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30" style:parent-style-name="Policepardéfaut" style:family="text">
      <style:text-properties style:font-name="Courier New" style:font-name-asian="Times New Roman" style:font-name-complex="Courier New" fo:color="#57ABFF" style:letter-kerning="false" fo:font-size="10.5pt" style:font-size-asian="10.5pt" style:font-size-complex="10.5pt" fo:language="en" fo:country="US" style:language-asian="fr" style:country-asian="FR"/>
    </style:style>
    <style:style style:name="T123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3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3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23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3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3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3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3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3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4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4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4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4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4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4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4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4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4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4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250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5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5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5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5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5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5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5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5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5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6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6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6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6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26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6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6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6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6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6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7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7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7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7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27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7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7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7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7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7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8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8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8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8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8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8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286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28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8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8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9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9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9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9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9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9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9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9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29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29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0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0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0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0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30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0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0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0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0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0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1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1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1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1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31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1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1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1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1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1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2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2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2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2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324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2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2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2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2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2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3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3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3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3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3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3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3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3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338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</style:style>
    <style:style style:name="T133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4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4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42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43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44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45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46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47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48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49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T1350" style:parent-style-name="Policepardéfaut" style:family="text">
      <style:text-properties style:font-name="Courier New" style:font-name-asian="Times New Roman" style:font-name-complex="Courier New" fo:color="#B2D9FF" style:letter-kerning="false" fo:font-size="10.5pt" style:font-size-asian="10.5pt" style:font-size-complex="10.5pt" fo:language="en" fo:country="US" style:language-asian="fr" style:country-asian="FR"/>
    </style:style>
    <style:style style:name="T1351" style:parent-style-name="Policepardéfaut" style:family="text">
      <style:text-properties style:font-name="Courier New" style:font-name-asian="Times New Roman" style:font-name-complex="Courier New" fo:color="#EDEDEE" style:letter-kerning="false" fo:font-size="10.5pt" style:font-size-asian="10.5pt" style:font-size-complex="10.5pt" fo:language="en" fo:country="US" style:language-asian="fr" style:country-asian="FR"/>
    </style:style>
    <style:style style:name="P1352" style:parent-style-name="Normal" style:family="paragraph">
      <style:paragraph-properties style:line-break="normal" fo:margin-bottom="0in" fo:line-height="100%" fo:background-color="#2525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252527"/>
      </style:paragraph-properties>
      <style:text-properties style:font-name="Courier New" style:font-name-asian="Times New Roman" style:font-name-complex="Courier New" fo:color="#EDEDEE" style:letter-kerning="false" fo:font-size="10.5pt" style:font-size-asian="10.5pt" style:font-size-complex="10.5pt" style:language-asian="fr" style:country-asian="FR"/>
    </style:style>
    <style:style style:name="P1353" style:parent-style-name="Normal" style:family="paragraph">
      <style:paragraph-properties fo:margin-top="0.25in" fo:margin-bottom="0.25in" fo:line-height="100%"/>
    </style:style>
    <style:style style:name="T13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55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356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357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358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359" style:parent-style-name="Normal" style:list-style-name="LFO1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360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36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62" style:parent-style-name="Normal" style:list-style-name="LFO1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63" style:parent-style-name="Normal" style:list-style-name="LFO1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36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65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36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6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36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6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37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7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37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73" style:parent-style-name="Normal" style:list-style-name="LFO1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374" style:parent-style-name="Policepardéfaut" style:family="text">
      <style:text-properties style:font-name="Segoe UI Emoji" style:font-name-asian="Times New Roman" style:font-name-complex="Segoe UI Emoji" fo:color="#EDEDEE" style:letter-kerning="false" fo:font-size="10.5pt" style:font-size-asian="10.5pt" style:font-size-complex="10.5pt" style:language-asian="fr" style:country-asian="FR"/>
    </style:style>
    <style:style style:name="T1375" style:parent-style-name="Policepardéfaut" style:family="text">
      <style:text-properties style:font-name="IBM Plex Sans" style:font-name-asian="Times New Roman" style:font-name-complex="IBM Plex Sans" fo:color="#EDEDEE" style:letter-kerning="false" fo:font-size="10.5pt" style:font-size-asian="10.5pt" style:font-size-complex="10.5pt" style:language-asian="fr" style:country-asian="FR"/>
    </style:style>
    <style:style style:name="T1376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P1377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378" style:parent-style-name="Normal" style:list-style-name="LFO2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79" style:parent-style-name="Normal" style:list-style-name="LFO2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38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8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38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83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384" style:parent-style-name="Normal" style:family="paragraph">
      <style:paragraph-properties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85" style:parent-style-name="Normal" style:list-style-name="LFO3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</style:style>
    <style:style style:name="T138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87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38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89" style:parent-style-name="Normal" style:list-style-name="LFO3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</style:style>
    <style:style style:name="T139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91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39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93" style:parent-style-name="Policepardéfaut" style:family="text">
      <style:text-properties style:font-name="IBM Plex Sans" style:font-name-asian="Times New Roman" style:font-name-complex="IBM Plex Sans" fo:color="#EDEDEE" style:letter-kerning="false" fo:font-size="10.5pt" style:font-size-asian="10.5pt" style:font-size-complex="10.5pt" style:language-asian="fr" style:country-asian="FR"/>
    </style:style>
    <style:style style:name="T139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395" style:parent-style-name="Normal" style:list-style-name="LFO3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</style:style>
    <style:style style:name="T139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97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39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399" style:parent-style-name="Policepardéfaut" style:family="text">
      <style:text-properties style:font-name="IBM Plex Sans" style:font-name-asian="Times New Roman" style:font-name-complex="IBM Plex Sans" fo:color="#EDEDEE" style:letter-kerning="false" fo:font-size="10.5pt" style:font-size-asian="10.5pt" style:font-size-complex="10.5pt" style:language-asian="fr" style:country-asian="FR"/>
    </style:style>
    <style:style style:name="T140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401" style:parent-style-name="Normal" style:list-style-name="LFO3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</style:style>
    <style:style style:name="T140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03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40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405" style:parent-style-name="Normal" style:list-style-name="LFO3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</style:style>
    <style:style style:name="T140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07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40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09" style:parent-style-name="Policepardéfaut" style:family="text">
      <style:text-properties style:font-name="IBM Plex Sans" style:font-name-asian="Times New Roman" style:font-name-complex="IBM Plex Sans" fo:color="#EDEDEE" style:letter-kerning="false" fo:font-size="10.5pt" style:font-size-asian="10.5pt" style:font-size-complex="10.5pt" style:language-asian="fr" style:country-asian="FR"/>
    </style:style>
    <style:style style:name="T141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411" style:parent-style-name="Normal" style:family="paragraph">
      <style:paragraph-properties fo:margin-top="0.25in" fo:margin-bottom="0.25in" fo:line-height="100%"/>
    </style:style>
    <style:style style:name="T141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13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414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415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1416" style:parent-style-name="Policepardéfaut" style:family="text">
      <style:text-properties style:font-name="Arial" style:font-name-asian="Times New Roman" style:font-name-complex="Arial" fo:color="#EDEDEE" style:letter-kerning="false" fo:font-size="18pt" style:font-size-asian="18pt" style:font-size-complex="18pt" style:language-asian="fr" style:country-asian="FR"/>
    </style:style>
    <style:style style:name="T1417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ableColumn1419" style:family="table-column">
      <style:table-column-properties style:column-width="1.6583in"/>
    </style:style>
    <style:style style:name="TableColumn1420" style:family="table-column">
      <style:table-column-properties style:column-width="2.0354in"/>
    </style:style>
    <style:style style:name="TableColumn1421" style:family="table-column">
      <style:table-column-properties style:column-width="5.0562in"/>
    </style:style>
    <style:style style:name="Table1418" style:family="table">
      <style:table-properties style:width="8.75in" fo:margin-left="0in" table:align="left"/>
    </style:style>
    <style:style style:name="TableRow1422" style:family="table-row">
      <style:table-row-properties/>
    </style:style>
    <style:style style:name="TableCell142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24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2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26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2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28" style:parent-style-name="Normal" style:family="paragraph">
      <style:paragraph-properties fo:text-align="center"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429" style:family="table-row">
      <style:table-row-properties/>
    </style:style>
    <style:style style:name="TableCell143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3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3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33" style:parent-style-name="Normal" style:family="paragraph">
      <style:paragraph-properties fo:margin-bottom="0in" fo:line-height="100%"/>
    </style:style>
    <style:style style:name="T1434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43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36" style:parent-style-name="Normal" style:family="paragraph">
      <style:paragraph-properties fo:margin-bottom="0in" fo:line-height="100%"/>
    </style:style>
    <style:style style:name="T143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Row1438" style:family="table-row">
      <style:table-row-properties/>
    </style:style>
    <style:style style:name="TableCell1439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4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41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42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4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44" style:parent-style-name="Normal" style:family="paragraph">
      <style:paragraph-properties fo:margin-bottom="0in" fo:line-height="100%"/>
    </style:style>
    <style:style style:name="T144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44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4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44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45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5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Row1452" style:family="table-row">
      <style:table-row-properties/>
    </style:style>
    <style:style style:name="TableCell1453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5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55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5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5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5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459" style:family="table-row">
      <style:table-row-properties/>
    </style:style>
    <style:style style:name="TableCell1460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6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6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6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64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6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466" style:family="table-row">
      <style:table-row-properties/>
    </style:style>
    <style:style style:name="TableCell1467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6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69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70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71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72" style:parent-style-name="Normal" style:family="paragraph">
      <style:paragraph-properties fo:margin-bottom="0in" fo:line-height="100%"/>
    </style:style>
    <style:style style:name="T147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Row1474" style:family="table-row">
      <style:table-row-properties/>
    </style:style>
    <style:style style:name="TableCell147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7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7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78" style:parent-style-name="Normal" style:family="paragraph">
      <style:paragraph-properties fo:margin-bottom="0in" fo:line-height="100%"/>
    </style:style>
    <style:style style:name="T1479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80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481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82" style:parent-style-name="Normal" style:family="paragraph">
      <style:paragraph-properties fo:margin-bottom="0in" fo:line-height="100%"/>
    </style:style>
    <style:style style:name="T148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484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Row1485" style:family="table-row">
      <style:table-row-properties/>
    </style:style>
    <style:style style:name="TableCell148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8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8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8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fo:language="en" fo:country="US" style:language-asian="fr" style:country-asian="FR"/>
    </style:style>
    <style:style style:name="TableCell149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49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492" style:family="table-row">
      <style:table-row-properties/>
    </style:style>
    <style:style style:name="TableCell149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9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9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96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49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49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499" style:family="table-row">
      <style:table-row-properties/>
    </style:style>
    <style:style style:name="TableCell150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0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02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03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04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05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506" style:family="table-row">
      <style:table-row-properties/>
    </style:style>
    <style:style style:name="TableCell1507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08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09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10" style:parent-style-name="Normal" style:family="paragraph">
      <style:paragraph-properties fo:margin-bottom="0in" fo:line-height="100%"/>
    </style:style>
    <style:style style:name="T151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Cell1512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13" style:parent-style-name="Normal" style:family="paragraph">
      <style:paragraph-properties fo:margin-bottom="0in" fo:line-height="100%"/>
    </style:style>
    <style:style style:name="T1514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ableRow1515" style:family="table-row">
      <style:table-row-properties/>
    </style:style>
    <style:style style:name="TableCell1516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17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18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19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20" style:family="table-cell">
      <style:table-cell-properties fo:border="0.0138in solid #2C2D2E" fo:background-color="#1E1E1F" style:writing-mode="lr-tb" style:vertical-align="middle" fo:padding-top="0.0833in" fo:padding-left="0.125in" fo:padding-bottom="0.0833in" fo:padding-right="0.125in">
        <style:background-fill draw:fill="solid" draw:fill-color="#1E1E1F"/>
      </style:table-cell-properties>
    </style:style>
    <style:style style:name="P1521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Row1522" style:family="table-row">
      <style:table-row-properties/>
    </style:style>
    <style:style style:name="TableCell1523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24" style:parent-style-name="Normal" style:family="paragraph">
      <style:paragraph-properties fo:margin-bottom="0in" fo:line-height="100%"/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25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26" style:parent-style-name="Normal" style:family="paragraph">
      <style:paragraph-properties fo:margin-bottom="0in" fo:line-height="100%"/>
    </style:style>
    <style:style style:name="T152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2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ableCell1529" style:family="table-cell">
      <style:table-cell-properties fo:border="0.0138in solid #2C2D2E" fo:background-color="#1A1B1B" style:writing-mode="lr-tb" style:vertical-align="middle" fo:padding-top="0.0833in" fo:padding-left="0.125in" fo:padding-bottom="0.0833in" fo:padding-right="0.125in">
        <style:background-fill draw:fill="solid" draw:fill-color="#1A1B1B"/>
      </style:table-cell-properties>
    </style:style>
    <style:style style:name="P1530" style:parent-style-name="Normal" style:family="paragraph">
      <style:paragraph-properties fo:margin-bottom="0in" fo:line-height="100%"/>
    </style:style>
    <style:style style:name="T153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3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33" style:parent-style-name="Normal" style:family="paragraph">
      <style:paragraph-properties fo:margin-top="0.25in" fo:margin-bottom="0.25in" fo:line-height="100%"/>
    </style:style>
    <style:style style:name="T153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35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536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537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538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39" style:parent-style-name="Normal" style:list-style-name="LFO4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4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4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4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43" style:parent-style-name="Normal" style:list-style-name="LFO4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4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4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4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47" style:parent-style-name="Normal" style:list-style-name="LFO4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4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4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5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51" style:parent-style-name="Normal" style:list-style-name="LFO4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5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5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5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55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56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57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58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59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60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6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62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6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64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65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66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67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68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69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70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7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72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7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74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75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76" style:parent-style-name="Normal" style:list-style-name="LFO5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77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78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79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80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81" style:parent-style-name="Normal" style:list-style-name="LFO6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8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8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8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85" style:parent-style-name="Policepardéfaut" style:family="text">
      <style:text-properties style:font-name="Arial" style:font-name-asian="Times New Roman" style:font-name-complex="Arial" fo:color="#EDEDEE" style:letter-kerning="false" fo:font-size="10.5pt" style:font-size-asian="10.5pt" style:font-size-complex="10.5pt" style:language-asian="fr" style:country-asian="FR"/>
    </style:style>
    <style:style style:name="T1586" style:parent-style-name="Policepardéfaut" style:family="text">
      <style:text-properties style:font-name="IBM Plex Sans" style:font-name-asian="Times New Roman" style:font-name-complex="IBM Plex Sans" fo:color="#EDEDEE" style:letter-kerning="false" fo:font-size="10.5pt" style:font-size-asian="10.5pt" style:font-size-complex="10.5pt" style:language-asian="fr" style:country-asian="FR"/>
    </style:style>
    <style:style style:name="T158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58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89" style:parent-style-name="Normal" style:list-style-name="LFO6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90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91" style:parent-style-name="Normal" style:list-style-name="LFO7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92" style:parent-style-name="Normal" style:list-style-name="LFO7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93" style:parent-style-name="Normal" style:list-style-name="LFO7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94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95" style:parent-style-name="Normal" style:list-style-name="LFO8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596" style:parent-style-name="Normal" style:family="paragraph">
      <style:paragraph-properties fo:margin-top="0.25in" fo:margin-bottom="0.1666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5pt" style:font-size-asian="15pt" style:font-size-complex="15pt" style:language-asian="fr" style:country-asian="FR"/>
    </style:style>
    <style:style style:name="P1597" style:parent-style-name="Normal" style:list-style-name="LFO9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59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59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0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01" style:parent-style-name="Normal" style:list-style-name="LFO9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0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0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0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05" style:parent-style-name="Normal" style:list-style-name="LFO9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06" style:parent-style-name="Normal" style:list-style-name="LFO9" style:family="paragraph">
      <style:paragraph-properties fo:margin-top="0.0416in" fo:margin-bottom="0in" fo:line-height="100%" fo:background-color="#222223">
        <style:background-fill draw:fill="solid" draw:fill-color="#222223"/>
      </style:paragraph-properties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07" style:parent-style-name="Normal" style:family="paragraph">
      <style:paragraph-properties fo:margin-top="0.25in" fo:margin-bottom="0.25in" fo:line-height="100%"/>
    </style:style>
    <style:style style:name="T16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09" style:parent-style-name="Normal" style:family="paragraph">
      <style:paragraph-properties fo:border-top="none" fo:border-left="none" fo:border-bottom="0.0138in solid #252527" fo:border-right="none" fo:padding-top="0in" fo:padding-left="0in" fo:padding-bottom="0.0833in" fo:padding-right="0in" style:shadow="none" fo:margin-top="0.3333in" fo:margin-bottom="0.1666in" fo:line-height="100%" fo:background-color="#222223">
        <style:background-fill draw:fill="solid" draw:fill-color="#222223"/>
      </style:paragraph-properties>
    </style:style>
    <style:style style:name="T1610" style:parent-style-name="Policepardéfaut" style:family="text">
      <style:text-properties style:font-name="Segoe UI Emoji" style:font-name-asian="Times New Roman" style:font-name-complex="Segoe UI Emoji" fo:color="#EDEDEE" style:letter-kerning="false" fo:font-size="18pt" style:font-size-asian="18pt" style:font-size-complex="18pt" style:language-asian="fr" style:country-asian="FR"/>
    </style:style>
    <style:style style:name="T1611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T1612" style:parent-style-name="Policepardéfaut" style:family="text">
      <style:text-properties style:font-name="IBM Plex Sans" style:font-name-asian="Times New Roman" style:font-name-complex="IBM Plex Sans" fo:color="#EDEDEE" style:letter-kerning="false" fo:font-size="18pt" style:font-size-asian="18pt" style:font-size-complex="18pt" style:language-asian="fr" style:country-asian="FR"/>
    </style:style>
    <style:style style:name="T1613" style:parent-style-name="Policepardéfaut" style:family="text">
      <style:text-properties style:font-name="IBM Plex Sans" style:font-name-asian="Times New Roman" style:font-name-complex="Times New Roman" fo:color="#EDEDEE" style:letter-kerning="false" fo:font-size="18pt" style:font-size-asian="18pt" style:font-size-complex="18pt" style:language-asian="fr" style:country-asian="FR"/>
    </style:style>
    <style:style style:name="P1614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15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1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1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1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19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2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21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22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23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2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2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2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27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28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29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30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3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32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33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34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35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36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37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38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39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40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41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42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4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44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45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T1646" style:parent-style-name="Policepardéfaut" style:family="text">
      <style:text-properties style:font-name="Courier New" style:font-name-asian="Times New Roman" style:font-name-complex="Courier New" fo:color="#B2B3B5" style:letter-kerning="false" fo:font-size="10pt" style:font-size-asian="10pt" style:font-size-complex="10pt" fo:background-color="#252527" style:language-asian="fr" style:country-asian="FR"/>
    </style:style>
    <style:style style:name="T1647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48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49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50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51" style:parent-style-name="Normal" style:list-style-name="LFO10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52" style:parent-style-name="Policepardéfaut" style:family="text">
      <style:text-properties style:font-name="IBM Plex Sans" style:font-name-asian="Times New Roman" style:font-name-complex="Times New Roman" fo:font-weight="bold" style:font-weight-asian="bold" style:font-weight-complex="bold" fo:color="#EDEDEE" style:letter-kerning="false" fo:font-size="10.5pt" style:font-size-asian="10.5pt" style:font-size-complex="10.5pt" style:language-asian="fr" style:country-asian="FR"/>
    </style:style>
    <style:style style:name="T1653" style:parent-style-name="Policepardéfaut" style:family="text">
      <style:text-properties style:font-name="IBM Plex Sans" style:font-name-asian="Times New Roman" style:font-name-complex="Times New Roman" fo:color="#EDEDEE" style:letter-kerning="false" fo:font-size="10.5pt" style:font-size-asian="10.5pt" style:font-size-complex="10.5pt" style:language-asian="fr" style:country-asian="FR"/>
    </style:style>
    <style:style style:name="P1654" style:parent-style-name="Normal" style:family="paragraph">
      <style:paragraph-properties fo:margin-top="0.25in" fo:margin-bottom="0.25in" fo:line-height="100%"/>
    </style:style>
    <style:style style:name="T16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56" style:parent-style-name="Normal" style:family="paragraph">
      <style:paragraph-properties fo:margin-bottom="0in" fo:line-height="100%" fo:background-color="#222223">
        <style:background-fill draw:fill="solid" draw:fill-color="#222223"/>
      </style:paragraph-properties>
    </style:style>
    <style:style style:name="T1657" style:parent-style-name="Policepardéfaut" style:family="text">
      <style:text-properties style:font-name="IBM Plex Sans" style:font-name-asian="Times New Roman" style:font-name-complex="Times New Roman" fo:font-style="italic" style:font-style-asian="italic" style:font-style-complex="italic" fo:color="#EDEDEE" style:letter-kerning="false" fo:font-size="10.5pt" style:font-size-asian="10.5pt" style:font-size-complex="10.5pt" style:language-asian="fr" style:country-asian="FR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<text:span text:style-name="T2">📄</text:span><text:span text:style-name="T3"><text:s/>Blueprint — "Les Plantes Sacrées de l'Afrique de l'Ouest"</text:span></text:h>
      <text:p text:style-name="P4">Document de réplication basé sur l'app "Les Animaux Sacrés de l'Afrique de l'Ouest"</text:p>
      <text:p text:style-name="P5"><text:span text:style-name="T6"><draw:custom-shape svg:x="0in" svg:y="0in" svg:width="0in" svg:height="0.01042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7" text:outline-level="2"><text:span text:style-name="T8">🎯</text:span><text:span text:style-name="T9"><text:s/>Concept général</text:span></text:h>
      <text:p text:style-name="P10"><text:span text:style-name="T11">Clone de l'application </text:span><text:span text:style-name="T12">"Les Animaux Sacrés de l'Afrique de l'Ouest"</text:span><text:span text:style-name="T13">, adaptée aux plantes médicinales, rituelles et sacrées d'Afrique de l'Ouest. Même structure, même philosophie, même esthétique — mais centrée sur le monde végétal et ses symboliques spirituelles.</text:span></text:p>
      <text:p text:style-name="P14"><text:span text:style-name="T15"><draw:custom-shape svg:x="0in" svg:y="0in" svg:width="0in" svg:height="0.01042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6" text:outline-level="2"><text:span text:style-name="T17">🏗️</text:span><text:span text:style-name="T18"><text:s/>Stack technique (identique à l'original)</text:span></text:h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Couche</text:p>
            </table:table-cell>
            <table:table-cell table:style-name="TableCell25">
              <text:p text:style-name="P26">Technologie</text:p>
            </table:table-cell>
          </table:table-row>
        </table:table-header-rows>
        <table:table-row table:style-name="TableRow27">
          <table:table-cell table:style-name="TableCell28">
            <text:p text:style-name="P29">Mobile</text:p>
          </table:table-cell>
          <table:table-cell table:style-name="TableCell30">
            <text:p text:style-name="P31">React Native + Expo SDK 54 + TypeScript</text:p>
          </table:table-cell>
        </table:table-row>
        <table:table-row table:style-name="TableRow32">
          <table:table-cell table:style-name="TableCell33">
            <text:p text:style-name="P34">Navigation</text:p>
          </table:table-cell>
          <table:table-cell table:style-name="TableCell35">
            <text:p text:style-name="P36">Expo Router (file-based, tabs + stack)</text:p>
          </table:table-cell>
        </table:table-row>
        <table:table-row table:style-name="TableRow37">
          <table:table-cell table:style-name="TableCell38">
            <text:p text:style-name="P39">UI</text:p>
          </table:table-cell>
          <table:table-cell table:style-name="TableCell40">
            <text:p text:style-name="P41">StyleSheet RN, expo-linear-gradient, @expo/vector-icons</text:p>
          </table:table-cell>
        </table:table-row>
        <table:table-row table:style-name="TableRow42">
          <table:table-cell table:style-name="TableCell43">
            <text:p text:style-name="P44">État global</text:p>
          </table:table-cell>
          <table:table-cell table:style-name="TableCell45">
            <text:p text:style-name="P46">React Context API (PlantContext, AuthContext)</text:p>
          </table:table-cell>
        </table:table-row>
        <table:table-row table:style-name="TableRow47">
          <table:table-cell table:style-name="TableCell48">
            <text:p text:style-name="P49">Persistance</text:p>
          </table:table-cell>
          <table:table-cell table:style-name="TableCell50">
            <text:p text:style-name="P51">@react-native-async-storage/async-storage</text:p>
          </table:table-cell>
        </table:table-row>
        <table:table-row table:style-name="TableRow52">
          <table:table-cell table:style-name="TableCell53">
            <text:p text:style-name="P54">Backend</text:p>
          </table:table-cell>
          <table:table-cell table:style-name="TableCell55">
            <text:p text:style-name="P56">Node.js + Express + Drizzle ORM + PostgreSQL</text:p>
          </table:table-cell>
        </table:table-row>
        <table:table-row table:style-name="TableRow57">
          <table:table-cell table:style-name="TableCell58">
            <text:p text:style-name="P59">IA</text:p>
          </table:table-cell>
          <table:table-cell table:style-name="TableCell60">
            <text:p text:style-name="P61">Groq SDK — Llama-3.3-70b</text:p>
          </table:table-cell>
        </table:table-row>
        <table:table-row table:style-name="TableRow62">
          <table:table-cell table:style-name="TableCell63">
            <text:p text:style-name="P64">Build</text:p>
          </table:table-cell>
          <table:table-cell table:style-name="TableCell65">
            <text:p text:style-name="P66">EAS Build (profil preview APK, profil production AAB)</text:p>
          </table:table-cell>
        </table:table-row>
        <table:table-row table:style-name="TableRow67">
          <table:table-cell table:style-name="TableCell68">
            <text:p text:style-name="P69">Déploiement web</text:p>
          </table:table-cell>
          <table:table-cell table:style-name="TableCell70">
            <text:p text:style-name="P71">Railway (build Metro statique)</text:p>
          </table:table-cell>
        </table:table-row>
        <table:table-row table:style-name="TableRow72">
          <table:table-cell table:style-name="TableCell73">
            <text:p text:style-name="P74">i18n</text:p>
          </table:table-cell>
          <table:table-cell table:style-name="TableCell75">
            <text:p text:style-name="P76">Système custom (Français, English + 3 langues locales)</text:p>
          </table:table-cell>
        </table:table-row>
      </table:table>
      <text:p text:style-name="P77"><text:span text:style-name="T78"><draw:custom-shape svg:x="0in" svg:y="0in" svg:width="0in" svg:height="0.01042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79" text:outline-level="2"><text:span text:style-name="T80">📁</text:span><text:span text:style-name="T81"><text:s/>Structure de navigation (Expo Router)</text:span></text:h>
      <text:p text:style-name="P82">app/</text:p>
      <text:p text:style-name="P83">├── (auth)/</text:p>
      <text:p text:style-name="P84">│ <text:s text:c="2"/>├── login.tsx <text:s text:c="9"/>← Connexion</text:p>
      <text:p text:style-name="P85">│ <text:s text:c="2"/>└── register.tsx <text:s text:c="6"/>← Inscription</text:p>
      <text:p text:style-name="P86">├── (tabs)/</text:p>
      <text:p text:style-name="P87">│ <text:s text:c="2"/>├── _layout.tsx <text:s text:c="7"/>← Barre de navigation 6 onglets</text:p>
      <text:p text:style-name="P88">│ <text:s text:c="2"/>├── index.tsx <text:s text:c="9"/>← Accueil (Plante du jour + stats + quiz)</text:p>
      <text:p text:style-name="P89">│ <text:s text:c="2"/>├── plantes.tsx <text:s text:c="7"/>← Bibliothèque des plantes</text:p>
      <text:p text:style-name="P90">│ <text:s text:c="2"/>├── savoir.tsx <text:s text:c="8"/>← Savoirs traditionnels</text:p>
      <text:p text:style-name="P91">│ <text:s text:c="2"/>├── ma-plante.tsx <text:s text:c="5"/>← Ma Plante Totem</text:p>
      <text:p text:style-name="P92">│ <text:s text:c="2"/>├── quiz.tsx <text:s text:c="10"/>← Quiz de révélation</text:p>
      <text:p text:style-name="P93">│ <text:s text:c="2"/>└── profil.tsx <text:s text:c="8"/>← Profil utilisateur</text:p>
      <text:p text:style-name="P94">├── plant/[id].tsx <text:s text:c="8"/>← Fiche détaillée d'une plante</text:p>
      <text:p text:style-name="P95">└── chat-plante.tsx <text:s text:c="7"/>← Chat IA avec la plante totem</text:p>
      <text:p text:style-name="P96"><text:span text:style-name="T97"><draw:custom-shape svg:x="0in" svg:y="0in" svg:width="0in" svg:height="0.01042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98" text:outline-level="2"><text:span text:style-name="T99">🌿</text:span><text:span text:style-name="T100"><text:s/>Structure de données — type </text:span><text:span text:style-name="T101">Plante</text:span></text:h>
      <text:p text:style-name="P102"><text:span text:style-name="T103">type</text:span><text:span text:style-name="T104"><text:s/></text:span><text:span text:style-name="T105">Element</text:span><text:span text:style-name="T106"><text:s/></text:span><text:span text:style-name="T107">=</text:span><text:span text:style-name="T108"><text:s/></text:span><text:span text:style-name="T109">'Feu'</text:span><text:span text:style-name="T110"><text:s/></text:span><text:span text:style-name="T111">|</text:span><text:span text:style-name="T112"><text:s/></text:span><text:span text:style-name="T113">'Eau'</text:span><text:span text:style-name="T114"><text:s/></text:span><text:span text:style-name="T115">|</text:span><text:span text:style-name="T116"><text:s/></text:span><text:span text:style-name="T117">'Terre'</text:span><text:span text:style-name="T118"><text:s/></text:span><text:span text:style-name="T119">|</text:span><text:span text:style-name="T120"><text:s/></text:span><text:span text:style-name="T121">'Air'</text:span><text:span text:style-name="T122"><text:s/></text:span><text:span text:style-name="T123">|</text:span><text:span text:style-name="T124"><text:s/></text:span><text:span text:style-name="T125">'Bois'</text:span><text:span text:style-name="T126">;</text:span></text:p>
      <text:p text:style-name="P127"><text:span text:style-name="T128">type</text:span><text:span text:style-name="T129"><text:s/></text:span><text:span text:style-name="T130">Categorie</text:span><text:span text:style-name="T131"><text:s/></text:span><text:span text:style-name="T132">=</text:span></text:p>
      <text:p text:style-name="P133"><text:span text:style-name="T134"><text:s text:c="2"/></text:span><text:span text:style-name="T135">|</text:span><text:span text:style-name="T136"><text:s/></text:span><text:span text:style-name="T137">'Arbres sacrés'</text:span></text:p>
      <text:p text:style-name="P138"><text:span text:style-name="T139"><text:s text:c="2"/></text:span><text:span text:style-name="T140">|</text:span><text:span text:style-name="T141"><text:s/></text:span><text:span text:style-name="T142">'Plantes médicinales'</text:span></text:p>
      <text:p text:style-name="P143"><text:span text:style-name="T144"><text:s text:c="2"/></text:span><text:span text:style-name="T145">|</text:span><text:span text:style-name="T146"><text:s/></text:span><text:span text:style-name="T147">'Herbes rituelles'</text:span></text:p>
      <text:p text:style-name="P148"><text:span text:style-name="T149"><text:s text:c="2"/></text:span><text:span text:style-name="T150">|</text:span><text:span text:style-name="T151"><text:s/></text:span><text:span text:style-name="T152">'Lianes et grimpantes'</text:span></text:p>
      <text:p text:style-name="P153"><text:span text:style-name="T154"><text:s text:c="2"/></text:span><text:span text:style-name="T155">|</text:span><text:span text:style-name="T156"><text:s/></text:span><text:span text:style-name="T157">'Champignons sacrés'</text:span></text:p>
      <text:p text:style-name="P158"><text:span text:style-name="T159"><text:s text:c="2"/></text:span><text:span text:style-name="T160">|</text:span><text:span text:style-name="T161"><text:s/></text:span><text:span text:style-name="T162">'Plantes aquatiques'</text:span><text:span text:style-name="T163">;</text:span></text:p>
      <text:p text:style-name="P164"><text:span text:style-name="T165">interface</text:span><text:span text:style-name="T166"><text:s/></text:span><text:span text:style-name="T167">Plante</text:span><text:span text:style-name="T168"><text:s/>{</text:span></text:p>
      <text:p text:style-name="P169"><text:span text:style-name="T170"><text:s text:c="2"/></text:span><text:span text:style-name="T171">// --- Identité ---</text:span></text:p>
      <text:p text:style-name="P172"><text:span text:style-name="T173"><text:s text:c="2"/></text:span><text:span text:style-name="T174">id</text:span><text:span text:style-name="T175">:<text:s/></text:span><text:span text:style-name="T176">string</text:span><text:span text:style-name="T177">; <text:s text:c="23"/></text:span><text:span text:style-name="T178">// slug ASCII sans accent ex: "baobab"</text:span></text:p>
      <text:p text:style-name="P179"><text:span text:style-name="T180"><text:s text:c="2"/></text:span><text:span text:style-name="T181">nom</text:span><text:span text:style-name="T182">:<text:s/></text:span><text:span text:style-name="T183">string</text:span><text:span text:style-name="T184">; <text:s text:c="22"/></text:span><text:span text:style-name="T185">// Nom français : "Baobab"</text:span></text:p>
      <text:p text:style-name="P186"><text:span text:style-name="T187"><text:s text:c="2"/></text:span><text:span text:style-name="T188">nomAnglais</text:span><text:span text:style-name="T189">:<text:s/></text:span><text:span text:style-name="T190">string</text:span><text:span text:style-name="T191">; <text:s text:c="15"/></text:span><text:span text:style-name="T192">// "Baobab"</text:span></text:p>
      <text:p text:style-name="P193"><text:span text:style-name="T194"><text:s text:c="2"/></text:span><text:span text:style-name="T195">nomScientifique</text:span><text:span text:style-name="T196">:<text:s/></text:span><text:span text:style-name="T197">string</text:span><text:span text:style-name="T198">; <text:s text:c="10"/></text:span><text:span text:style-name="T199">// "Adansonia digitata"</text:span></text:p>
      <text:p text:style-name="P200"><text:span text:style-name="T201"><text:s text:c="2"/></text:span><text:span text:style-name="T202">categorie</text:span><text:span text:style-name="T203">:<text:s/></text:span><text:span text:style-name="T204">Categorie</text:span><text:span text:style-name="T205">;</text:span></text:p>
      <text:p text:style-name="P206"><text:span text:style-name="T207"><text:s text:c="2"/></text:span><text:span text:style-name="T208">element</text:span><text:span text:style-name="T209">:<text:s/></text:span><text:span text:style-name="T210">Element</text:span><text:span text:style-name="T211">;</text:span></text:p>
      <text:p text:style-name="P212"><text:span text:style-name="T213"><text:s text:c="2"/></text:span><text:span text:style-name="T214">// --- Contenus narratifs ---</text:span></text:p>
      <text:p text:style-name="P215"><text:span text:style-name="T216"><text:s text:c="2"/></text:span><text:span text:style-name="T217">description</text:span><text:span text:style-name="T218">:<text:s/></text:span><text:span text:style-name="T219">string</text:span><text:span text:style-name="T220">; <text:s text:c="14"/></text:span><text:span text:style-name="T221">// 2-3 phrases d'introduction</text:span></text:p>
      <text:p text:style-name="P222"><text:span text:style-name="T223"><text:s text:c="2"/></text:span><text:span text:style-name="T224">symboliqueAfricaine</text:span><text:span text:style-name="T225">:<text:s/></text:span><text:span text:style-name="T226">string</text:span><text:span text:style-name="T227">; <text:s text:c="6"/></text:span><text:span text:style-name="T228">// Symbolique dans les traditions locales (200-300 mots)</text:span></text:p>
      <text:p text:style-name="P229"><text:span text:style-name="T230"><text:s text:c="2"/></text:span><text:span text:style-name="T231">symboliqueSpirirtuelle</text:span><text:span text:style-name="T232">:<text:s/></text:span><text:span text:style-name="T233">string</text:span><text:span text:style-name="T234">; <text:s text:c="3"/></text:span><text:span text:style-name="T235">// Symbolique spirituelle universelle</text:span></text:p>
      <text:p text:style-name="P236"><text:span text:style-name="T237"><text:s text:c="2"/></text:span><text:span text:style-name="T238">symbolique</text:span><text:span text:style-name="T239">:<text:s/></text:span><text:span text:style-name="T240">string</text:span><text:span text:style-name="T241">; <text:s text:c="15"/></text:span><text:span text:style-name="T242">// Phrase résumé courte</text:span></text:p>
      <text:p text:style-name="P243"><text:span text:style-name="T244"><text:s text:c="2"/></text:span><text:span text:style-name="T245">// --- Caractère ---</text:span></text:p>
      <text:p text:style-name="P246"><text:span text:style-name="T247"><text:s text:c="2"/></text:span><text:span text:style-name="T248">qualites</text:span><text:span text:style-name="T249">:<text:s/></text:span><text:span text:style-name="T250">string</text:span><text:span text:style-name="T251">[]; <text:s text:c="15"/></text:span><text:span text:style-name="T252">// 4-6 qualités que la plante enseigne</text:span></text:p>
      <text:p text:style-name="P253"><text:span text:style-name="T254"><text:s text:c="2"/></text:span><text:span text:style-name="T255">defauts</text:span><text:span text:style-name="T256">:<text:s/></text:span><text:span text:style-name="T257">string</text:span><text:span text:style-name="T258">[]; <text:s text:c="16"/></text:span><text:span text:style-name="T259">// 2-3 ombres ou excès</text:span></text:p>
      <text:p text:style-name="P260"><text:span text:style-name="T261"><text:s text:c="2"/></text:span><text:span text:style-name="T262">pouvoirs</text:span><text:span text:style-name="T263">:<text:s/></text:span><text:span text:style-name="T264">string</text:span><text:span text:style-name="T265">[]; <text:s text:c="15"/></text:span><text:span text:style-name="T266">// 3-5 pouvoirs/usages traditionnels</text:span></text:p>
      <text:p text:style-name="P267"><text:span text:style-name="T268"><text:s text:c="2"/></text:span><text:span text:style-name="T269">enseignements</text:span><text:span text:style-name="T270">:<text:s/></text:span><text:span text:style-name="T271">string</text:span><text:span text:style-name="T272">[]; <text:s text:c="10"/></text:span><text:span text:style-name="T273">// 3-4 enseignements spirituels</text:span></text:p>
      <text:p text:style-name="P274"><text:span text:style-name="T275"><text:s text:c="2"/></text:span><text:span text:style-name="T276">// --- Sagesse ---</text:span></text:p>
      <text:p text:style-name="P277"><text:span text:style-name="T278"><text:s text:c="2"/></text:span><text:span text:style-name="T279">citation</text:span><text:span text:style-name="T280">:<text:s/></text:span><text:span text:style-name="T281">string</text:span><text:span text:style-name="T282">; <text:s text:c="17"/></text:span><text:span text:style-name="T283">// 1 citation-clé</text:span></text:p>
      <text:p text:style-name="P284"><text:span text:style-name="T285"><text:s text:c="2"/></text:span><text:span text:style-name="T286">proverbes</text:span><text:span text:style-name="T287">:<text:s/></text:span><text:span text:style-name="T288">string</text:span><text:span text:style-name="T289">[]; <text:s text:c="14"/></text:span><text:span text:style-name="T290">// 3-4 proverbes africains liés</text:span></text:p>
      <text:soft-page-break/>
      <text:p text:style-name="P291"><text:span text:style-name="T292"><text:s text:c="2"/></text:span><text:span text:style-name="T293">legendes</text:span><text:span text:style-name="T294">:<text:s/></text:span><text:span text:style-name="T295">string</text:span><text:span text:style-name="T296">[]; <text:s text:c="15"/></text:span><text:span text:style-name="T297">// 2 légendes/mythes fondateurs</text:span></text:p>
      <text:p text:style-name="P298"><text:span text:style-name="T299"><text:s text:c="2"/></text:span><text:span text:style-name="T300">conseilsDeVie</text:span><text:span text:style-name="T301">:<text:s/></text:span><text:span text:style-name="T302">string</text:span><text:span text:style-name="T303">[]; <text:s text:c="10"/></text:span><text:span text:style-name="T304">// 4-5 conseils de vie</text:span></text:p>
      <text:p text:style-name="P305"><text:span text:style-name="T306"><text:s text:c="2"/></text:span><text:span text:style-name="T307">enseignementDuJour</text:span><text:span text:style-name="T308">:<text:s/></text:span><text:span text:style-name="T309">string</text:span><text:span text:style-name="T310">; <text:s text:c="7"/></text:span><text:span text:style-name="T311">// Message quotidien court</text:span></text:p>
      <text:p text:style-name="P312"><text:span text:style-name="T313"><text:s text:c="2"/></text:span><text:span text:style-name="T314">// --- Niveau ---</text:span></text:p>
      <text:p text:style-name="P315"><text:span text:style-name="T316"><text:s text:c="2"/></text:span><text:span text:style-name="T317">niveauSpirituel</text:span><text:span text:style-name="T318">:<text:s/></text:span><text:span text:style-name="T319">1</text:span><text:span text:style-name="T320"><text:s/></text:span><text:span text:style-name="T321">|</text:span><text:span text:style-name="T322"><text:s/></text:span><text:span text:style-name="T323">2</text:span><text:span text:style-name="T324"><text:s/></text:span><text:span text:style-name="T325">|</text:span><text:span text:style-name="T326"><text:s/></text:span><text:span text:style-name="T327">3</text:span><text:span text:style-name="T328"><text:s/></text:span><text:span text:style-name="T329">|</text:span><text:span text:style-name="T330"><text:s/></text:span><text:span text:style-name="T331">4</text:span><text:span text:style-name="T332"><text:s/></text:span><text:span text:style-name="T333">|</text:span><text:span text:style-name="T334"><text:s/></text:span><text:span text:style-name="T335">5</text:span><text:span text:style-name="T336">; <text:s/></text:span><text:span text:style-name="T337">// Profondeur ésotérique</text:span></text:p>
      <text:p text:style-name="P338"><text:span text:style-name="T339"><text:s text:c="2"/></text:span><text:span text:style-name="T340">// --- Thème visuel ---</text:span></text:p>
      <text:p text:style-name="P341"><text:span text:style-name="T342"><text:s text:c="2"/></text:span><text:span text:style-name="T343">couleur</text:span><text:span text:style-name="T344">:<text:s/></text:span><text:span text:style-name="T345">string</text:span><text:span text:style-name="T346">; <text:s text:c="18"/></text:span><text:span text:style-name="T347">// Couleur primaire hex (thème dynamique)</text:span></text:p>
      <text:p text:style-name="P348"><text:span text:style-name="T349"><text:s text:c="2"/></text:span><text:span text:style-name="T350">couleurSecondaire</text:span><text:span text:style-name="T351">:<text:s/></text:span><text:span text:style-name="T352">string</text:span><text:span text:style-name="T353">; <text:s text:c="8"/></text:span><text:span text:style-name="T354">// Couleur secondaire hex</text:span></text:p>
      <text:p text:style-name="P355"><text:span text:style-name="T356"><text:s text:c="2"/></text:span><text:span text:style-name="T357">// --- Champs spécifiques aux plantes (nouveaux) ---</text:span></text:p>
      <text:p text:style-name="P358"><text:span text:style-name="T359"><text:s text:c="2"/></text:span><text:span text:style-name="T360">usagesMedicinaux</text:span><text:span text:style-name="T361">:<text:s/></text:span><text:span text:style-name="T362">string</text:span><text:span text:style-name="T363">[]; <text:s text:c="7"/></text:span><text:span text:style-name="T364">// Usages médicinaux traditionnels</text:span></text:p>
      <text:p text:style-name="P365"><text:span text:style-name="T366"><text:s text:c="2"/></text:span><text:span text:style-name="T367">partiesUtilisees</text:span><text:span text:style-name="T368">:<text:s/></text:span><text:span text:style-name="T369">string</text:span><text:span text:style-name="T370">[]; <text:s text:c="7"/></text:span><text:span text:style-name="T371">// Feuilles, racines, écorce, fruit, etc.</text:span></text:p>
      <text:p text:style-name="P372"><text:span text:style-name="T373"><text:s text:c="2"/></text:span><text:span text:style-name="T374">peuplesConcernes</text:span><text:span text:style-name="T375">:<text:s/></text:span><text:span text:style-name="T376">string</text:span><text:span text:style-name="T377">[]; <text:s text:c="7"/></text:span><text:span text:style-name="T378">// Bambara, Mossi, Dogon, Peul…</text:span></text:p>
      <text:p text:style-name="P379"><text:span text:style-name="T380"><text:s text:c="2"/></text:span><text:span text:style-name="T381">habitat</text:span><text:span text:style-name="T382">:<text:s/></text:span><text:span text:style-name="T383">string</text:span><text:span text:style-name="T384">; <text:s text:c="18"/></text:span><text:span text:style-name="T385">// Savane, forêt galerie, zone sahélienne…</text:span></text:p>
      <text:p text:style-name="P386">}</text:p>
      <text:p text:style-name="P387"><text:span text:style-name="T388"><draw:custom-shape svg:x="0in" svg:y="0in" svg:width="0in" svg:height="0.01042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389" text:outline-level="2"><text:span text:style-name="T390">🌿</text:span><text:span text:style-name="T391"><text:s/>Liste de 40 plantes suggérées</text:span></text:h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  <table:table-column table:style-name="TableColumn396"/>
        </table:table-columns>
        <table:table-header-rows>
          <table:table-row table:style-name="TableRow397">
            <table:table-cell table:style-name="TableCell398">
              <text:p text:style-name="P399">ID</text:p>
            </table:table-cell>
            <table:table-cell table:style-name="TableCell400">
              <text:p text:style-name="P401">Nom</text:p>
            </table:table-cell>
            <table:table-cell table:style-name="TableCell402">
              <text:p text:style-name="P403">Catégorie</text:p>
            </table:table-cell>
            <table:table-cell table:style-name="TableCell404">
              <text:p text:style-name="P405">Élément</text:p>
            </table:table-cell>
          </table:table-row>
        </table:table-header-rows>
        <table:table-row table:style-name="TableRow406">
          <table:table-cell table:style-name="TableCell407">
            <text:p text:style-name="P408"><text:span text:style-name="T409">baobab</text:span></text:p>
          </table:table-cell>
          <table:table-cell table:style-name="TableCell410">
            <text:p text:style-name="P411">Baobab</text:p>
          </table:table-cell>
          <table:table-cell table:style-name="TableCell412">
            <text:p text:style-name="P413">Arbres sacrés</text:p>
          </table:table-cell>
          <table:table-cell table:style-name="TableCell414">
            <text:p text:style-name="P415">Eau</text:p>
          </table:table-cell>
        </table:table-row>
        <table:table-row table:style-name="TableRow416">
          <table:table-cell table:style-name="TableCell417">
            <text:p text:style-name="P418"><text:span text:style-name="T419">fromager</text:span></text:p>
          </table:table-cell>
          <table:table-cell table:style-name="TableCell420">
            <text:p text:style-name="P421">Fromager (Kapokier)</text:p>
          </table:table-cell>
          <table:table-cell table:style-name="TableCell422">
            <text:p text:style-name="P423">Arbres sacrés</text:p>
          </table:table-cell>
          <table:table-cell table:style-name="TableCell424">
            <text:p text:style-name="P425">Air</text:p>
          </table:table-cell>
        </table:table-row>
        <table:table-row table:style-name="TableRow426">
          <table:table-cell table:style-name="TableCell427">
            <text:p text:style-name="P428"><text:span text:style-name="T429">neem</text:span></text:p>
          </table:table-cell>
          <table:table-cell table:style-name="TableCell430">
            <text:p text:style-name="P431">Neem</text:p>
          </table:table-cell>
          <table:table-cell table:style-name="TableCell432">
            <text:p text:style-name="P433">Plantes médicinales</text:p>
          </table:table-cell>
          <table:table-cell table:style-name="TableCell434">
            <text:p text:style-name="P435">Feu</text:p>
          </table:table-cell>
        </table:table-row>
        <table:table-row table:style-name="TableRow436">
          <table:table-cell table:style-name="TableCell437">
            <text:p text:style-name="P438"><text:span text:style-name="T439">kola</text:span></text:p>
          </table:table-cell>
          <table:table-cell table:style-name="TableCell440">
            <text:p text:style-name="P441">Kolatier</text:p>
          </table:table-cell>
          <table:table-cell table:style-name="TableCell442">
            <text:p text:style-name="P443">Arbres sacrés</text:p>
          </table:table-cell>
          <table:table-cell table:style-name="TableCell444">
            <text:p text:style-name="P445">Feu</text:p>
          </table:table-cell>
        </table:table-row>
        <table:table-row table:style-name="TableRow446">
          <table:table-cell table:style-name="TableCell447">
            <text:p text:style-name="P448"><text:span text:style-name="T449">shea</text:span></text:p>
          </table:table-cell>
          <table:table-cell table:style-name="TableCell450">
            <text:p text:style-name="P451">Karité</text:p>
          </table:table-cell>
          <table:table-cell table:style-name="TableCell452">
            <text:p text:style-name="P453">Arbres sacrés</text:p>
          </table:table-cell>
          <table:table-cell table:style-name="TableCell454">
            <text:p text:style-name="P455">Terre</text:p>
          </table:table-cell>
        </table:table-row>
        <table:table-row table:style-name="TableRow456">
          <table:table-cell table:style-name="TableCell457">
            <text:p text:style-name="P458"><text:span text:style-name="T459">moringa</text:span></text:p>
          </table:table-cell>
          <table:table-cell table:style-name="TableCell460">
            <text:p text:style-name="P461">Moringa</text:p>
          </table:table-cell>
          <table:table-cell table:style-name="TableCell462">
            <text:p text:style-name="P463">Plantes médicinales</text:p>
          </table:table-cell>
          <table:table-cell table:style-name="TableCell464">
            <text:p text:style-name="P465">Air</text:p>
          </table:table-cell>
        </table:table-row>
        <table:table-row table:style-name="TableRow466">
          <table:table-cell table:style-name="TableCell467">
            <text:p text:style-name="P468"><text:span text:style-name="T469">kinkeliba</text:span></text:p>
          </table:table-cell>
          <table:table-cell table:style-name="TableCell470">
            <text:p text:style-name="P471">Kinkeliba</text:p>
          </table:table-cell>
          <table:table-cell table:style-name="TableCell472">
            <text:p text:style-name="P473">Plantes médicinales</text:p>
          </table:table-cell>
          <table:table-cell table:style-name="TableCell474">
            <text:p text:style-name="P475">Eau</text:p>
          </table:table-cell>
        </table:table-row>
        <table:table-row table:style-name="TableRow476">
          <table:table-cell table:style-name="TableCell477">
            <text:p text:style-name="P478"><text:span text:style-name="T479">gombo</text:span></text:p>
          </table:table-cell>
          <table:table-cell table:style-name="TableCell480">
            <text:p text:style-name="P481">Gombo</text:p>
          </table:table-cell>
          <table:table-cell table:style-name="TableCell482">
            <text:p text:style-name="P483">Herbes rituelles</text:p>
          </table:table-cell>
          <table:table-cell table:style-name="TableCell484">
            <text:p text:style-name="P485">Terre</text:p>
          </table:table-cell>
        </table:table-row>
        <table:table-row table:style-name="TableRow486">
          <table:table-cell table:style-name="TableCell487">
            <text:p text:style-name="P488"><text:span text:style-name="T489">bissap</text:span></text:p>
          </table:table-cell>
          <table:table-cell table:style-name="TableCell490">
            <text:p text:style-name="P491">Bissap (Hibiscus)</text:p>
          </table:table-cell>
          <table:table-cell table:style-name="TableCell492">
            <text:p text:style-name="P493">Herbes rituelles</text:p>
          </table:table-cell>
          <table:table-cell table:style-name="TableCell494">
            <text:p text:style-name="P495">Feu</text:p>
          </table:table-cell>
        </table:table-row>
        <table:table-row table:style-name="TableRow496">
          <table:table-cell table:style-name="TableCell497">
            <text:p text:style-name="P498"><text:span text:style-name="T499">vetiver</text:span></text:p>
          </table:table-cell>
          <table:table-cell table:style-name="TableCell500">
            <text:p text:style-name="P501">Vétiver</text:p>
          </table:table-cell>
          <table:table-cell table:style-name="TableCell502">
            <text:p text:style-name="P503">Herbes rituelles</text:p>
          </table:table-cell>
          <table:table-cell table:style-name="TableCell504">
            <text:p text:style-name="P505">Terre</text:p>
          </table:table-cell>
        </table:table-row>
        <table:table-row table:style-name="TableRow506">
          <table:table-cell table:style-name="TableCell507">
            <text:p text:style-name="P508"><text:span text:style-name="T509">citronnelle</text:span></text:p>
          </table:table-cell>
          <table:table-cell table:style-name="TableCell510">
            <text:p text:style-name="P511">Citronnelle</text:p>
          </table:table-cell>
          <table:table-cell table:style-name="TableCell512">
            <text:p text:style-name="P513">Herbes rituelles</text:p>
          </table:table-cell>
          <table:table-cell table:style-name="TableCell514">
            <text:p text:style-name="P515">Air</text:p>
          </table:table-cell>
        </table:table-row>
        <table:table-row table:style-name="TableRow516">
          <table:table-cell table:style-name="TableCell517">
            <text:p text:style-name="P518"><text:span text:style-name="T519">artemisia</text:span></text:p>
          </table:table-cell>
          <table:table-cell table:style-name="TableCell520">
            <text:p text:style-name="P521">Artémisia (Armoise)</text:p>
          </table:table-cell>
          <table:table-cell table:style-name="TableCell522">
            <text:p text:style-name="P523">Plantes médicinales</text:p>
          </table:table-cell>
          <table:table-cell table:style-name="TableCell524">
            <text:p text:style-name="P525">Feu</text:p>
          </table:table-cell>
        </table:table-row>
        <table:table-row table:style-name="TableRow526">
          <table:table-cell table:style-name="TableCell527">
            <text:p text:style-name="P528"><text:span text:style-name="T529">papayer</text:span></text:p>
          </table:table-cell>
          <table:table-cell table:style-name="TableCell530">
            <text:p text:style-name="P531">Papayer</text:p>
          </table:table-cell>
          <table:table-cell table:style-name="TableCell532">
            <text:p text:style-name="P533">Arbres sacrés</text:p>
          </table:table-cell>
          <table:table-cell table:style-name="TableCell534">
            <text:p text:style-name="P535">Eau</text:p>
          </table:table-cell>
        </table:table-row>
        <text:soft-page-break/>
        <table:table-row table:style-name="TableRow536">
          <table:table-cell table:style-name="TableCell537">
            <text:p text:style-name="P538"><text:span text:style-name="T539">manguier</text:span></text:p>
          </table:table-cell>
          <table:table-cell table:style-name="TableCell540">
            <text:p text:style-name="P541">Manguier</text:p>
          </table:table-cell>
          <table:table-cell table:style-name="TableCell542">
            <text:p text:style-name="P543">Arbres sacrés</text:p>
          </table:table-cell>
          <table:table-cell table:style-name="TableCell544">
            <text:p text:style-name="P545">Bois</text:p>
          </table:table-cell>
        </table:table-row>
        <table:table-row table:style-name="TableRow546">
          <table:table-cell table:style-name="TableCell547">
            <text:p text:style-name="P548"><text:span text:style-name="T549">ficus</text:span></text:p>
          </table:table-cell>
          <table:table-cell table:style-name="TableCell550">
            <text:p text:style-name="P551">Ficus sacré</text:p>
          </table:table-cell>
          <table:table-cell table:style-name="TableCell552">
            <text:p text:style-name="P553">Arbres sacrés</text:p>
          </table:table-cell>
          <table:table-cell table:style-name="TableCell554">
            <text:p text:style-name="P555">Eau</text:p>
          </table:table-cell>
        </table:table-row>
        <table:table-row table:style-name="TableRow556">
          <table:table-cell table:style-name="TableCell557">
            <text:p text:style-name="P558"><text:span text:style-name="T559">acacia</text:span></text:p>
          </table:table-cell>
          <table:table-cell table:style-name="TableCell560">
            <text:p text:style-name="P561">Acacia</text:p>
          </table:table-cell>
          <table:table-cell table:style-name="TableCell562">
            <text:p text:style-name="P563">Arbres sacrés</text:p>
          </table:table-cell>
          <table:table-cell table:style-name="TableCell564">
            <text:p text:style-name="P565">Feu</text:p>
          </table:table-cell>
        </table:table-row>
        <table:table-row table:style-name="TableRow566">
          <table:table-cell table:style-name="TableCell567">
            <text:p text:style-name="P568"><text:span text:style-name="T569">raisin-singe</text:span></text:p>
          </table:table-cell>
          <table:table-cell table:style-name="TableCell570">
            <text:p text:style-name="P571">Raisin de singe</text:p>
          </table:table-cell>
          <table:table-cell table:style-name="TableCell572">
            <text:p text:style-name="P573">Lianes et grimpantes</text:p>
          </table:table-cell>
          <table:table-cell table:style-name="TableCell574">
            <text:p text:style-name="P575">Bois</text:p>
          </table:table-cell>
        </table:table-row>
        <table:table-row table:style-name="TableRow576">
          <table:table-cell table:style-name="TableCell577">
            <text:p text:style-name="P578"><text:span text:style-name="T579">henne</text:span></text:p>
          </table:table-cell>
          <table:table-cell table:style-name="TableCell580">
            <text:p text:style-name="P581">Henné</text:p>
          </table:table-cell>
          <table:table-cell table:style-name="TableCell582">
            <text:p text:style-name="P583">Herbes rituelles</text:p>
          </table:table-cell>
          <table:table-cell table:style-name="TableCell584">
            <text:p text:style-name="P585">Feu</text:p>
          </table:table-cell>
        </table:table-row>
        <table:table-row table:style-name="TableRow586">
          <table:table-cell table:style-name="TableCell587">
            <text:p text:style-name="P588"><text:span text:style-name="T589">gingembre</text:span></text:p>
          </table:table-cell>
          <table:table-cell table:style-name="TableCell590">
            <text:p text:style-name="P591">Gingembre</text:p>
          </table:table-cell>
          <table:table-cell table:style-name="TableCell592">
            <text:p text:style-name="P593">Plantes médicinales</text:p>
          </table:table-cell>
          <table:table-cell table:style-name="TableCell594">
            <text:p text:style-name="P595">Feu</text:p>
          </table:table-cell>
        </table:table-row>
        <table:table-row table:style-name="TableRow596">
          <table:table-cell table:style-name="TableCell597">
            <text:p text:style-name="P598"><text:span text:style-name="T599">curcuma</text:span></text:p>
          </table:table-cell>
          <table:table-cell table:style-name="TableCell600">
            <text:p text:style-name="P601">Curcuma</text:p>
          </table:table-cell>
          <table:table-cell table:style-name="TableCell602">
            <text:p text:style-name="P603">Plantes médicinales</text:p>
          </table:table-cell>
          <table:table-cell table:style-name="TableCell604">
            <text:p text:style-name="P605">Feu</text:p>
          </table:table-cell>
        </table:table-row>
        <table:table-row table:style-name="TableRow606">
          <table:table-cell table:style-name="TableCell607">
            <text:p text:style-name="P608"><text:span text:style-name="T609">poivre-selim</text:span></text:p>
          </table:table-cell>
          <table:table-cell table:style-name="TableCell610">
            <text:p text:style-name="P611">Poivre de Sélim</text:p>
          </table:table-cell>
          <table:table-cell table:style-name="TableCell612">
            <text:p text:style-name="P613">Plantes médicinales</text:p>
          </table:table-cell>
          <table:table-cell table:style-name="TableCell614">
            <text:p text:style-name="P615">Terre</text:p>
          </table:table-cell>
        </table:table-row>
        <table:table-row table:style-name="TableRow616">
          <table:table-cell table:style-name="TableCell617">
            <text:p text:style-name="P618"><text:span text:style-name="T619">graines-paradis</text:span></text:p>
          </table:table-cell>
          <table:table-cell table:style-name="TableCell620">
            <text:p text:style-name="P621">Graines de paradis</text:p>
          </table:table-cell>
          <table:table-cell table:style-name="TableCell622">
            <text:p text:style-name="P623">Herbes rituelles</text:p>
          </table:table-cell>
          <table:table-cell table:style-name="TableCell624">
            <text:p text:style-name="P625">Feu</text:p>
          </table:table-cell>
        </table:table-row>
        <table:table-row table:style-name="TableRow626">
          <table:table-cell table:style-name="TableCell627">
            <text:p text:style-name="P628"><text:span text:style-name="T629">dattier</text:span></text:p>
          </table:table-cell>
          <table:table-cell table:style-name="TableCell630">
            <text:p text:style-name="P631">Dattier du désert</text:p>
          </table:table-cell>
          <table:table-cell table:style-name="TableCell632">
            <text:p text:style-name="P633">Arbres sacrés</text:p>
          </table:table-cell>
          <table:table-cell table:style-name="TableCell634">
            <text:p text:style-name="P635">Feu</text:p>
          </table:table-cell>
        </table:table-row>
        <table:table-row table:style-name="TableRow636">
          <table:table-cell table:style-name="TableCell637">
            <text:p text:style-name="P638"><text:span text:style-name="T639">ronier</text:span></text:p>
          </table:table-cell>
          <table:table-cell table:style-name="TableCell640">
            <text:p text:style-name="P641">Rônier (Palmier)</text:p>
          </table:table-cell>
          <table:table-cell table:style-name="TableCell642">
            <text:p text:style-name="P643">Arbres sacrés</text:p>
          </table:table-cell>
          <table:table-cell table:style-name="TableCell644">
            <text:p text:style-name="P645">Bois</text:p>
          </table:table-cell>
        </table:table-row>
        <table:table-row table:style-name="TableRow646">
          <table:table-cell table:style-name="TableCell647">
            <text:p text:style-name="P648"><text:span text:style-name="T649">liane-rouge</text:span></text:p>
          </table:table-cell>
          <table:table-cell table:style-name="TableCell650">
            <text:p text:style-name="P651">Liane rouge</text:p>
          </table:table-cell>
          <table:table-cell table:style-name="TableCell652">
            <text:p text:style-name="P653">Lianes et grimpantes</text:p>
          </table:table-cell>
          <table:table-cell table:style-name="TableCell654">
            <text:p text:style-name="P655">Feu</text:p>
          </table:table-cell>
        </table:table-row>
        <table:table-row table:style-name="TableRow656">
          <table:table-cell table:style-name="TableCell657">
            <text:p text:style-name="P658"><text:span text:style-name="T659">lombi</text:span></text:p>
          </table:table-cell>
          <table:table-cell table:style-name="TableCell660">
            <text:p text:style-name="P661">Lombi</text:p>
          </table:table-cell>
          <table:table-cell table:style-name="TableCell662">
            <text:p text:style-name="P663">Plantes médicinales</text:p>
          </table:table-cell>
          <table:table-cell table:style-name="TableCell664">
            <text:p text:style-name="P665">Terre</text:p>
          </table:table-cell>
        </table:table-row>
        <table:table-row table:style-name="TableRow666">
          <table:table-cell table:style-name="TableCell667">
            <text:p text:style-name="P668"><text:span text:style-name="T669">soumbala</text:span></text:p>
          </table:table-cell>
          <table:table-cell table:style-name="TableCell670">
            <text:p text:style-name="P671">Néré (Soumbala)</text:p>
          </table:table-cell>
          <table:table-cell table:style-name="TableCell672">
            <text:p text:style-name="P673">Arbres sacrés</text:p>
          </table:table-cell>
          <table:table-cell table:style-name="TableCell674">
            <text:p text:style-name="P675">Terre</text:p>
          </table:table-cell>
        </table:table-row>
        <table:table-row table:style-name="TableRow676">
          <table:table-cell table:style-name="TableCell677">
            <text:p text:style-name="P678"><text:span text:style-name="T679">eucalyptus</text:span></text:p>
          </table:table-cell>
          <table:table-cell table:style-name="TableCell680">
            <text:p text:style-name="P681">Eucalyptus</text:p>
          </table:table-cell>
          <table:table-cell table:style-name="TableCell682">
            <text:p text:style-name="P683">Plantes médicinales</text:p>
          </table:table-cell>
          <table:table-cell table:style-name="TableCell684">
            <text:p text:style-name="P685">Air</text:p>
          </table:table-cell>
        </table:table-row>
        <table:table-row table:style-name="TableRow686">
          <table:table-cell table:style-name="TableCell687">
            <text:p text:style-name="P688"><text:span text:style-name="T689">cailcedrat</text:span></text:p>
          </table:table-cell>
          <table:table-cell table:style-name="TableCell690">
            <text:p text:style-name="P691">Caïlcédrat</text:p>
          </table:table-cell>
          <table:table-cell table:style-name="TableCell692">
            <text:p text:style-name="P693">Arbres sacrés</text:p>
          </table:table-cell>
          <table:table-cell table:style-name="TableCell694">
            <text:p text:style-name="P695">Bois</text:p>
          </table:table-cell>
        </table:table-row>
        <table:table-row table:style-name="TableRow696">
          <table:table-cell table:style-name="TableCell697">
            <text:p text:style-name="P698"><text:span text:style-name="T699">tamarinier</text:span></text:p>
          </table:table-cell>
          <table:table-cell table:style-name="TableCell700">
            <text:p text:style-name="P701">Tamarinier</text:p>
          </table:table-cell>
          <table:table-cell table:style-name="TableCell702">
            <text:p text:style-name="P703">Arbres sacrés</text:p>
          </table:table-cell>
          <table:table-cell table:style-name="TableCell704">
            <text:p text:style-name="P705">Terre</text:p>
          </table:table-cell>
        </table:table-row>
        <table:table-row table:style-name="TableRow706">
          <table:table-cell table:style-name="TableCell707">
            <text:p text:style-name="P708"><text:span text:style-name="T709">lotus</text:span></text:p>
          </table:table-cell>
          <table:table-cell table:style-name="TableCell710">
            <text:p text:style-name="P711">Lotus du Nil</text:p>
          </table:table-cell>
          <table:table-cell table:style-name="TableCell712">
            <text:p text:style-name="P713">Plantes aquatiques</text:p>
          </table:table-cell>
          <table:table-cell table:style-name="TableCell714">
            <text:p text:style-name="P715">Eau</text:p>
          </table:table-cell>
        </table:table-row>
        <table:table-row table:style-name="TableRow716">
          <table:table-cell table:style-name="TableCell717">
            <text:p text:style-name="P718"><text:span text:style-name="T719">papyrus</text:span></text:p>
          </table:table-cell>
          <table:table-cell table:style-name="TableCell720">
            <text:p text:style-name="P721">Papyrus</text:p>
          </table:table-cell>
          <table:table-cell table:style-name="TableCell722">
            <text:p text:style-name="P723">Plantes aquatiques</text:p>
          </table:table-cell>
          <table:table-cell table:style-name="TableCell724">
            <text:p text:style-name="P725">Eau</text:p>
          </table:table-cell>
        </table:table-row>
        <table:table-row table:style-name="TableRow726">
          <table:table-cell table:style-name="TableCell727">
            <text:p text:style-name="P728"><text:span text:style-name="T729">sureau</text:span></text:p>
          </table:table-cell>
          <table:table-cell table:style-name="TableCell730">
            <text:p text:style-name="P731">Sureau africain</text:p>
          </table:table-cell>
          <table:table-cell table:style-name="TableCell732">
            <text:p text:style-name="P733">Plantes médicinales</text:p>
          </table:table-cell>
          <table:table-cell table:style-name="TableCell734">
            <text:p text:style-name="P735">Air</text:p>
          </table:table-cell>
        </table:table-row>
        <table:table-row table:style-name="TableRow736">
          <table:table-cell table:style-name="TableCell737">
            <text:p text:style-name="P738"><text:span text:style-name="T739">quinqueliba</text:span></text:p>
          </table:table-cell>
          <table:table-cell table:style-name="TableCell740">
            <text:p text:style-name="P741">Quinquéliba</text:p>
          </table:table-cell>
          <table:table-cell table:style-name="TableCell742">
            <text:p text:style-name="P743">Herbes rituelles</text:p>
          </table:table-cell>
          <table:table-cell table:style-name="TableCell744">
            <text:p text:style-name="P745">Eau</text:p>
          </table:table-cell>
        </table:table-row>
        <table:table-row table:style-name="TableRow746">
          <table:table-cell table:style-name="TableCell747">
            <text:p text:style-name="P748"><text:span text:style-name="T749">yohimbe</text:span></text:p>
          </table:table-cell>
          <table:table-cell table:style-name="TableCell750">
            <text:p text:style-name="P751">Yohimbé</text:p>
          </table:table-cell>
          <table:table-cell table:style-name="TableCell752">
            <text:p text:style-name="P753">Plantes médicinales</text:p>
          </table:table-cell>
          <table:table-cell table:style-name="TableCell754">
            <text:p text:style-name="P755">Feu</text:p>
          </table:table-cell>
        </table:table-row>
        <table:table-row table:style-name="TableRow756">
          <table:table-cell table:style-name="TableCell757">
            <text:p text:style-name="P758"><text:span text:style-name="T759">iboga</text:span></text:p>
          </table:table-cell>
          <table:table-cell table:style-name="TableCell760">
            <text:p text:style-name="P761">Iboga</text:p>
          </table:table-cell>
          <table:table-cell table:style-name="TableCell762">
            <text:p text:style-name="P763">Herbes rituelles</text:p>
          </table:table-cell>
          <table:table-cell table:style-name="TableCell764">
            <text:p text:style-name="P765">Bois</text:p>
          </table:table-cell>
        </table:table-row>
        <table:table-row table:style-name="TableRow766">
          <table:table-cell table:style-name="TableCell767">
            <text:p text:style-name="P768"><text:span text:style-name="T769">galanga</text:span></text:p>
          </table:table-cell>
          <table:table-cell table:style-name="TableCell770">
            <text:p text:style-name="P771">Galanga</text:p>
          </table:table-cell>
          <table:table-cell table:style-name="TableCell772">
            <text:p text:style-name="P773">Herbes rituelles</text:p>
          </table:table-cell>
          <table:table-cell table:style-name="TableCell774">
            <text:p text:style-name="P775">Feu</text:p>
          </table:table-cell>
        </table:table-row>
        <table:table-row table:style-name="TableRow776">
          <table:table-cell table:style-name="TableCell777">
            <text:p text:style-name="P778"><text:span text:style-name="T779">fonio</text:span></text:p>
          </table:table-cell>
          <table:table-cell table:style-name="TableCell780">
            <text:p text:style-name="P781">Fonio sacré</text:p>
          </table:table-cell>
          <table:table-cell table:style-name="TableCell782">
            <text:p text:style-name="P783">Herbes rituelles</text:p>
          </table:table-cell>
          <table:table-cell table:style-name="TableCell784">
            <text:p text:style-name="P785">Terre</text:p>
          </table:table-cell>
        </table:table-row>
        <text:soft-page-break/>
        <table:table-row table:style-name="TableRow786">
          <table:table-cell table:style-name="TableCell787">
            <text:p text:style-name="P788"><text:span text:style-name="T789">cola-amere</text:span></text:p>
          </table:table-cell>
          <table:table-cell table:style-name="TableCell790">
            <text:p text:style-name="P791">Cola amère</text:p>
          </table:table-cell>
          <table:table-cell table:style-name="TableCell792">
            <text:p text:style-name="P793">Plantes médicinales</text:p>
          </table:table-cell>
          <table:table-cell table:style-name="TableCell794">
            <text:p text:style-name="P795">Terre</text:p>
          </table:table-cell>
        </table:table-row>
        <table:table-row table:style-name="TableRow796">
          <table:table-cell table:style-name="TableCell797">
            <text:p text:style-name="P798"><text:span text:style-name="T799">indigofera</text:span></text:p>
          </table:table-cell>
          <table:table-cell table:style-name="TableCell800">
            <text:p text:style-name="P801">Indigotier</text:p>
          </table:table-cell>
          <table:table-cell table:style-name="TableCell802">
            <text:p text:style-name="P803">Herbes rituelles</text:p>
          </table:table-cell>
          <table:table-cell table:style-name="TableCell804">
            <text:p text:style-name="P805">Air</text:p>
          </table:table-cell>
        </table:table-row>
      </table:table>
      <text:p text:style-name="P806"><text:span text:style-name="T807"><draw:custom-shape svg:x="0in" svg:y="0in" svg:width="0in" svg:height="0.01042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808" text:outline-level="2"><text:span text:style-name="T809">🎯</text:span><text:span text:style-name="T810"><text:s/>Quiz — Révélation de la Plante Totem</text:span></text:h>
      <text:p text:style-name="P811"><text:span text:style-name="T812">Principe :</text:span><text:span text:style-name="T813"> 20 questions psycho-spirituelles. 5 dimensions notées (score 0-20 par dimension). Résultat = 1 plante principale + 1 plante secondaire parmi 7 plantes-totems.</text:span></text:p>
      <text:h text:style-name="P814" text:outline-level="3">Dimensions</text:h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</table:table-columns>
        <table:table-header-rows>
          <table:table-row table:style-name="TableRow819">
            <table:table-cell table:style-name="TableCell820">
              <text:p text:style-name="P821">Code</text:p>
            </table:table-cell>
            <table:table-cell table:style-name="TableCell822">
              <text:p text:style-name="P823">Dimension</text:p>
            </table:table-cell>
            <table:table-cell table:style-name="TableCell824">
              <text:p text:style-name="P825">Description</text:p>
            </table:table-cell>
          </table:table-row>
        </table:table-header-rows>
        <table:table-row table:style-name="TableRow826">
          <table:table-cell table:style-name="TableCell827">
            <text:p text:style-name="P828"><text:span text:style-name="T829">R</text:span></text:p>
          </table:table-cell>
          <table:table-cell table:style-name="TableCell830">
            <text:p text:style-name="P831">Racines</text:p>
          </table:table-cell>
          <table:table-cell table:style-name="TableCell832">
            <text:p text:style-name="P833">Ancrage, stabilité, mémoire ancestrale</text:p>
          </table:table-cell>
        </table:table-row>
        <table:table-row table:style-name="TableRow834">
          <table:table-cell table:style-name="TableCell835">
            <text:p text:style-name="P836"><text:span text:style-name="T837">F</text:span></text:p>
          </table:table-cell>
          <table:table-cell table:style-name="TableCell838">
            <text:p text:style-name="P839">Floraison</text:p>
          </table:table-cell>
          <table:table-cell table:style-name="TableCell840">
            <text:p text:style-name="P841">Créativité, expression, beauté</text:p>
          </table:table-cell>
        </table:table-row>
        <table:table-row table:style-name="TableRow842">
          <table:table-cell table:style-name="TableCell843">
            <text:p text:style-name="P844"><text:span text:style-name="T845">G</text:span></text:p>
          </table:table-cell>
          <table:table-cell table:style-name="TableCell846">
            <text:p text:style-name="P847">Guérison</text:p>
          </table:table-cell>
          <table:table-cell table:style-name="TableCell848">
            <text:p text:style-name="P849">Empathie, soin, transformation</text:p>
          </table:table-cell>
        </table:table-row>
        <table:table-row table:style-name="TableRow850">
          <table:table-cell table:style-name="TableCell851">
            <text:p text:style-name="P852"><text:span text:style-name="T853">L</text:span></text:p>
          </table:table-cell>
          <table:table-cell table:style-name="TableCell854">
            <text:p text:style-name="P855">Lumière</text:p>
          </table:table-cell>
          <table:table-cell table:style-name="TableCell856">
            <text:p text:style-name="P857">Intuition, clairvoyance, conscience</text:p>
          </table:table-cell>
        </table:table-row>
        <table:table-row table:style-name="TableRow858">
          <table:table-cell table:style-name="TableCell859">
            <text:p text:style-name="P860"><text:span text:style-name="T861">C</text:span></text:p>
          </table:table-cell>
          <table:table-cell table:style-name="TableCell862">
            <text:p text:style-name="P863">Croissance</text:p>
          </table:table-cell>
          <table:table-cell table:style-name="TableCell864">
            <text:p text:style-name="P865">Adaptabilité, résilience, évolution</text:p>
          </table:table-cell>
        </table:table-row>
      </table:table>
      <text:h text:style-name="P866" text:outline-level="3">Structure d'une question</text:h>
      <text:p text:style-name="P867"><text:span text:style-name="T868">interface</text:span><text:span text:style-name="T869"><text:s/></text:span><text:span text:style-name="T870">QuizQuestion</text:span><text:span text:style-name="T871"><text:s/>{</text:span></text:p>
      <text:p text:style-name="P872"><text:span text:style-name="T873"><text:s text:c="2"/></text:span><text:span text:style-name="T874">id</text:span><text:span text:style-name="T875">:<text:s/></text:span><text:span text:style-name="T876">string</text:span><text:span text:style-name="T877">;</text:span></text:p>
      <text:p text:style-name="P878"><text:span text:style-name="T879"><text:s text:c="2"/></text:span><text:span text:style-name="T880">question</text:span><text:span text:style-name="T881">:<text:s/></text:span><text:span text:style-name="T882">string</text:span><text:span text:style-name="T883">;</text:span></text:p>
      <text:p text:style-name="P884"><text:span text:style-name="T885"><text:s text:c="2"/></text:span><text:span text:style-name="T886">options</text:span><text:span text:style-name="T887">: {</text:span></text:p>
      <text:p text:style-name="P888"><text:span text:style-name="T889"><text:s text:c="4"/></text:span><text:span text:style-name="T890">A</text:span><text:span text:style-name="T891">:<text:s/></text:span><text:span text:style-name="T892">string</text:span><text:span text:style-name="T893">;</text:span></text:p>
      <text:p text:style-name="P894"><text:span text:style-name="T895"><text:s text:c="4"/></text:span><text:span text:style-name="T896">B</text:span><text:span text:style-name="T897">:<text:s/></text:span><text:span text:style-name="T898">string</text:span><text:span text:style-name="T899">;</text:span></text:p>
      <text:p text:style-name="P900"><text:s text:c="2"/>};</text:p>
      <text:p text:style-name="P901"><text:span text:style-name="T902"><text:s text:c="2"/></text:span><text:span text:style-name="T903">dimension</text:span><text:span text:style-name="T904">:<text:s/></text:span><text:span text:style-name="T905">'R'</text:span><text:span text:style-name="T906"><text:s/></text:span><text:span text:style-name="T907">|</text:span><text:span text:style-name="T908"><text:s/></text:span><text:span text:style-name="T909">'F'</text:span><text:span text:style-name="T910"><text:s/></text:span><text:span text:style-name="T911">|</text:span><text:span text:style-name="T912"><text:s/></text:span><text:span text:style-name="T913">'G'</text:span><text:span text:style-name="T914"><text:s/></text:span><text:span text:style-name="T915">|</text:span><text:span text:style-name="T916"><text:s/></text:span><text:span text:style-name="T917">'L'</text:span><text:span text:style-name="T918"><text:s/></text:span><text:span text:style-name="T919">|</text:span><text:span text:style-name="T920"><text:s/></text:span><text:span text:style-name="T921">'C'</text:span><text:span text:style-name="T922">;</text:span></text:p>
      <text:p text:style-name="P923">}</text:p>
      <text:h text:style-name="P924" text:outline-level="3">7 plantes-totems et leur correspondance</text:h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</table:table-columns>
        <table:table-header-rows>
          <table:table-row table:style-name="TableRow929">
            <table:table-cell table:style-name="TableCell930">
              <text:p text:style-name="P931">Plante</text:p>
            </table:table-cell>
            <table:table-cell table:style-name="TableCell932">
              <text:p text:style-name="P933">Dimensions dominantes</text:p>
            </table:table-cell>
            <table:table-cell table:style-name="TableCell934">
              <text:p text:style-name="P935">Profil</text:p>
            </table:table-cell>
          </table:table-row>
        </table:table-header-rows>
        <table:table-row table:style-name="TableRow936">
          <table:table-cell table:style-name="TableCell937">
            <text:p text:style-name="P938">Baobab</text:p>
          </table:table-cell>
          <table:table-cell table:style-name="TableCell939">
            <text:p text:style-name="P940">R fort</text:p>
          </table:table-cell>
          <table:table-cell table:style-name="TableCell941">
            <text:p text:style-name="P942">Ancré, mémoire longue, gardien</text:p>
          </table:table-cell>
        </table:table-row>
        <text:soft-page-break/>
        <table:table-row table:style-name="TableRow943">
          <table:table-cell table:style-name="TableCell944">
            <text:p text:style-name="P945">Fromager</text:p>
          </table:table-cell>
          <table:table-cell table:style-name="TableCell946">
            <text:p text:style-name="P947">L fort</text:p>
          </table:table-cell>
          <table:table-cell table:style-name="TableCell948">
            <text:p text:style-name="P949">Visionnaire, spirituel, élevé</text:p>
          </table:table-cell>
        </table:table-row>
        <table:table-row table:style-name="TableRow950">
          <table:table-cell table:style-name="TableCell951">
            <text:p text:style-name="P952">Moringa</text:p>
          </table:table-cell>
          <table:table-cell table:style-name="TableCell953">
            <text:p text:style-name="P954">G fort</text:p>
          </table:table-cell>
          <table:table-cell table:style-name="TableCell955">
            <text:p text:style-name="P956">Soignant, généreux, nourricier</text:p>
          </table:table-cell>
        </table:table-row>
        <table:table-row table:style-name="TableRow957">
          <table:table-cell table:style-name="TableCell958">
            <text:p text:style-name="P959">Iboga</text:p>
          </table:table-cell>
          <table:table-cell table:style-name="TableCell960">
            <text:p text:style-name="P961">L + G</text:p>
          </table:table-cell>
          <table:table-cell table:style-name="TableCell962">
            <text:p text:style-name="P963">Révélateur, intuitif, guérisseur profond</text:p>
          </table:table-cell>
        </table:table-row>
        <table:table-row table:style-name="TableRow964">
          <table:table-cell table:style-name="TableCell965">
            <text:p text:style-name="P966">Karité</text:p>
          </table:table-cell>
          <table:table-cell table:style-name="TableCell967">
            <text:p text:style-name="P968">F + R</text:p>
          </table:table-cell>
          <table:table-cell table:style-name="TableCell969">
            <text:p text:style-name="P970">Doux, créatif, enraciné</text:p>
          </table:table-cell>
        </table:table-row>
        <table:table-row table:style-name="TableRow971">
          <table:table-cell table:style-name="TableCell972">
            <text:p text:style-name="P973">Kinkeliba</text:p>
          </table:table-cell>
          <table:table-cell table:style-name="TableCell974">
            <text:p text:style-name="P975">G + C</text:p>
          </table:table-cell>
          <table:table-cell table:style-name="TableCell976">
            <text:p text:style-name="P977">Purificateur, clair, adaptable</text:p>
          </table:table-cell>
        </table:table-row>
        <table:table-row table:style-name="TableRow978">
          <table:table-cell table:style-name="TableCell979">
            <text:p text:style-name="P980">Acacia</text:p>
          </table:table-cell>
          <table:table-cell table:style-name="TableCell981">
            <text:p text:style-name="P982">R + C</text:p>
          </table:table-cell>
          <table:table-cell table:style-name="TableCell983">
            <text:p text:style-name="P984">Résistant, sage, structurant</text:p>
          </table:table-cell>
        </table:table-row>
      </table:table>
      <text:p text:style-name="P985"><text:span text:style-name="T986"><draw:custom-shape svg:x="0in" svg:y="0in" svg:width="0in" svg:height="0.01042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987" text:outline-level="2"><text:span text:style-name="T988">🤖</text:span><text:span text:style-name="T989"><text:s/>Chat IA — Prompt système</text:span></text:h>
      <text:p text:style-name="P990">Tu es [NOM_PLANTE], plante sacrée de l'Afrique de l'Ouest ([NOM_SCIENTIFIQUE]).</text:p>
      <text:p text:style-name="P991">Tu parles à [USERNAME] qui t'a été révélé(e) comme plante totem.</text:p>
      <text:p text:style-name="P992">Tu es [ELEMENT] — [TRAITS_ELEMENT].</text:p>
      <text:p text:style-name="P993">Tes enseignements :</text:p>
      <text:p text:style-name="P994">[ENSEIGNEMENTS_LISTE]</text:p>
      <text:p text:style-name="P995">Ta citation : "[CITATION]"</text:p>
      <text:p text:style-name="P996">Parle avec sagesse, poésie et ancrage végétal.</text:p>
      <text:p text:style-name="P997">Réponds en 2-4 phrases maximum.</text:p>
      <text:p text:style-name="P998">Langue : [LANGUE].</text:p>
      <text:p text:style-name="P999">Ne mentionne jamais que tu es une IA. Tu ES la plante.</text:p>
      <text:h text:style-name="P1000" text:outline-level="3">Traits par élément</text:h>
      <table:table table:style-name="Table1001">
        <table:table-columns>
          <table:table-column table:style-name="TableColumn1002"/>
          <table:table-column table:style-name="TableColumn1003"/>
          <table:table-column table:style-name="TableColumn1004"/>
        </table:table-columns>
        <table:table-header-rows>
          <table:table-row table:style-name="TableRow1005">
            <table:table-cell table:style-name="TableCell1006">
              <text:p text:style-name="P1007">Élément</text:p>
            </table:table-cell>
            <table:table-cell table:style-name="TableCell1008">
              <text:p text:style-name="P1009">Énergie</text:p>
            </table:table-cell>
            <table:table-cell table:style-name="TableCell1010">
              <text:p text:style-name="P1011">Voix</text:p>
            </table:table-cell>
          </table:table-row>
        </table:table-header-rows>
        <table:table-row table:style-name="TableRow1012">
          <table:table-cell table:style-name="TableCell1013">
            <text:p text:style-name="P1014">Terre</text:p>
          </table:table-cell>
          <table:table-cell table:style-name="TableCell1015">
            <text:p text:style-name="P1016">Ancré, patient, nourrissant, concret</text:p>
          </table:table-cell>
          <table:table-cell table:style-name="TableCell1017">
            <text:p text:style-name="P1018">Lente, profonde, stable</text:p>
          </table:table-cell>
        </table:table-row>
        <table:table-row table:style-name="TableRow1019">
          <table:table-cell table:style-name="TableCell1020">
            <text:p text:style-name="P1021">Eau</text:p>
          </table:table-cell>
          <table:table-cell table:style-name="TableCell1022">
            <text:p text:style-name="P1023">Fluide, guérisseur, purificateur</text:p>
          </table:table-cell>
          <table:table-cell table:style-name="TableCell1024">
            <text:p text:style-name="P1025">Douce, coulante, apaisante</text:p>
          </table:table-cell>
        </table:table-row>
        <table:table-row table:style-name="TableRow1026">
          <table:table-cell table:style-name="TableCell1027">
            <text:p text:style-name="P1028">Feu</text:p>
          </table:table-cell>
          <table:table-cell table:style-name="TableCell1029">
            <text:p text:style-name="P1030">Transformateur, purificateur, direct</text:p>
          </table:table-cell>
          <table:table-cell table:style-name="TableCell1031">
            <text:p text:style-name="P1032">Directe, ardente, nette</text:p>
          </table:table-cell>
        </table:table-row>
        <table:table-row table:style-name="TableRow1033">
          <table:table-cell table:style-name="TableCell1034">
            <text:p text:style-name="P1035">Air</text:p>
          </table:table-cell>
          <table:table-cell table:style-name="TableCell1036">
            <text:p text:style-name="P1037">Léger, visionnaire, messager</text:p>
          </table:table-cell>
          <table:table-cell table:style-name="TableCell1038">
            <text:p text:style-name="P1039">Fine, subtile, légère</text:p>
          </table:table-cell>
        </table:table-row>
        <table:table-row table:style-name="TableRow1040">
          <table:table-cell table:style-name="TableCell1041">
            <text:p text:style-name="P1042">Bois</text:p>
          </table:table-cell>
          <table:table-cell table:style-name="TableCell1043">
            <text:p text:style-name="P1044">Croissant, structurant, vivant, cyclique</text:p>
          </table:table-cell>
          <table:table-cell table:style-name="TableCell1045">
            <text:p text:style-name="P1046">Organique, spiralée, vivante</text:p>
          </table:table-cell>
        </table:table-row>
      </table:table>
      <text:p text:style-name="P1047"><text:span text:style-name="T1048"><draw:custom-shape svg:x="0in" svg:y="0in" svg:width="0in" svg:height="0.01042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1049" text:outline-level="2"><text:span text:style-name="T1050">🎨</text:span><text:span text:style-name="T1051"><text:s/>Système de couleurs</text:span></text:h>
      <text:p text:style-name="P1052"><text:span text:style-name="T1053">// Palette de base (fond "forêt sacrée" au lieu de "savane")</text:span></text:p>
      <text:p text:style-name="P1054"><text:span text:style-name="T1055">const</text:span><text:span text:style-name="T1056"><text:s/>COLORS<text:s/></text:span><text:span text:style-name="T1057">=</text:span><text:span text:style-name="T1058"><text:s/>{</text:span></text:p>
      <text:p text:style-name="P1059"><text:span text:style-name="T1060"><text:s text:c="2"/></text:span><text:span text:style-name="T1061">deepGreen</text:span><text:span text:style-name="T1062">: <text:s text:c="7"/></text:span><text:span text:style-name="T1063">'#0A1F0A'</text:span><text:span text:style-name="T1064">, <text:s text:c="2"/></text:span><text:span text:style-name="T1065">// Fond principal</text:span></text:p>
      <text:p text:style-name="P1066"><text:span text:style-name="T1067"><text:s text:c="2"/></text:span><text:span text:style-name="T1068">warmGreen</text:span><text:span text:style-name="T1069">: <text:s text:c="7"/></text:span><text:span text:style-name="T1070">'#1A3A1A'</text:span><text:span text:style-name="T1071">, <text:s text:c="2"/></text:span><text:span text:style-name="T1072">// Fond cartes</text:span></text:p>
      <text:p text:style-name="P1073"><text:span text:style-name="T1074"><text:s text:c="2"/></text:span><text:span text:style-name="T1075">gold</text:span><text:span text:style-name="T1076">: <text:s text:c="12"/></text:span><text:span text:style-name="T1077">'#C8A020'</text:span><text:span text:style-name="T1078">, <text:s text:c="2"/></text:span><text:span text:style-name="T1079">// Accents dorés</text:span></text:p>
      <text:p text:style-name="P1080"><text:span text:style-name="T1081"><text:s text:c="2"/></text:span><text:span text:style-name="T1082">ivory</text:span><text:span text:style-name="T1083">: <text:s text:c="11"/></text:span><text:span text:style-name="T1084">'#F0EAD6'</text:span><text:span text:style-name="T1085">, <text:s text:c="2"/></text:span><text:span text:style-name="T1086">// Texte principal</text:span></text:p>
      <text:p text:style-name="P1087"><text:span text:style-name="T1088"><text:s text:c="2"/></text:span><text:span text:style-name="T1089">softWhite</text:span><text:span text:style-name="T1090">: <text:s text:c="7"/></text:span><text:span text:style-name="T1091">'#E8F0E0'</text:span><text:span text:style-name="T1092">, <text:s text:c="2"/></text:span><text:span text:style-name="T1093">// Texte secondaire</text:span></text:p>
      <text:p text:style-name="P1094"><text:span text:style-name="T1095"><text:s text:c="2"/></text:span><text:span text:style-name="T1096">// Couleurs dynamiques par élément (thème de la fiche plante)</text:span></text:p>
      <text:p text:style-name="P1097"><text:span text:style-name="T1098"><text:s text:c="2"/></text:span><text:span text:style-name="T1099">elementTerre</text:span><text:span text:style-name="T1100">: <text:s text:c="4"/></text:span><text:span text:style-name="T1101">'#8B6914'</text:span><text:span text:style-name="T1102">, <text:s text:c="2"/></text:span><text:span text:style-name="T1103">// Ocre brun</text:span></text:p>
      <text:p text:style-name="P1104"><text:span text:style-name="T1105"><text:s text:c="2"/></text:span><text:span text:style-name="T1106">elementEau</text:span><text:span text:style-name="T1107">: <text:s text:c="6"/></text:span><text:span text:style-name="T1108">'#1A6B8A'</text:span><text:span text:style-name="T1109">, <text:s text:c="2"/></text:span><text:span text:style-name="T1110">// Bleu profond</text:span></text:p>
      <text:p text:style-name="P1111"><text:span text:style-name="T1112"><text:s text:c="2"/></text:span><text:span text:style-name="T1113">elementFeu</text:span><text:span text:style-name="T1114">: <text:s text:c="6"/></text:span><text:span text:style-name="T1115">'#C4622D'</text:span><text:span text:style-name="T1116">, <text:s text:c="2"/></text:span><text:span text:style-name="T1117">// Orange brûlé</text:span></text:p>
      <text:p text:style-name="P1118"><text:span text:style-name="T1119"><text:s text:c="2"/></text:span><text:span text:style-name="T1120">elementAir</text:span><text:span text:style-name="T1121">: <text:s text:c="6"/></text:span><text:span text:style-name="T1122">'#5A8A3A'</text:span><text:span text:style-name="T1123">, <text:s text:c="2"/></text:span><text:span text:style-name="T1124">// Vert clair</text:span></text:p>
      <text:p text:style-name="P1125"><text:span text:style-name="T1126"><text:s text:c="2"/></text:span><text:span text:style-name="T1127">elementBois</text:span><text:span text:style-name="T1128">: <text:s text:c="5"/></text:span><text:span text:style-name="T1129">'#2D6B2A'</text:span><text:span text:style-name="T1130">, <text:s text:c="2"/></text:span><text:span text:style-name="T1131">// Vert forêt sombre</text:span></text:p>
      <text:p text:style-name="P1132">};</text:p>
      <text:p text:style-name="P1133"><text:span text:style-name="T1134"><draw:custom-shape svg:x="0in" svg:y="0in" svg:width="0in" svg:height="0.01042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1135" text:outline-level="2"><text:span text:style-name="T1136">🌍</text:span><text:span text:style-name="T1137"><text:s/>Internationalisation (i18n)</text:span></text:h>
      <text:p text:style-name="P1138">Même 5 langues que l'app Animaux :</text:p>
      <table:table table:style-name="Table1139">
        <table:table-columns>
          <table:table-column table:style-name="TableColumn1140"/>
          <table:table-column table:style-name="TableColumn1141"/>
          <table:table-column table:style-name="TableColumn1142"/>
          <table:table-column table:style-name="TableColumn1143"/>
          <table:table-column table:style-name="TableColumn1144"/>
        </table:table-columns>
        <table:table-header-rows>
          <table:table-row table:style-name="TableRow1145">
            <table:table-cell table:style-name="TableCell1146">
              <text:p text:style-name="P1147">Code</text:p>
            </table:table-cell>
            <table:table-cell table:style-name="TableCell1148">
              <text:p text:style-name="P1149">Langue</text:p>
            </table:table-cell>
            <table:table-cell table:style-name="TableCell1150">
              <text:p text:style-name="P1151">"Plantes"</text:p>
            </table:table-cell>
            <table:table-cell table:style-name="TableCell1152">
              <text:p text:style-name="P1153">"Totem"</text:p>
            </table:table-cell>
            <table:table-cell table:style-name="TableCell1154">
              <text:p text:style-name="P1155">"Bibliothèque"</text:p>
            </table:table-cell>
          </table:table-row>
        </table:table-header-rows>
        <table:table-row table:style-name="TableRow1156">
          <table:table-cell table:style-name="TableCell1157">
            <text:p text:style-name="P1158"><text:span text:style-name="T1159">fr</text:span></text:p>
          </table:table-cell>
          <table:table-cell table:style-name="TableCell1160">
            <text:p text:style-name="P1161">Français</text:p>
          </table:table-cell>
          <table:table-cell table:style-name="TableCell1162">
            <text:p text:style-name="P1163">Plantes</text:p>
          </table:table-cell>
          <table:table-cell table:style-name="TableCell1164">
            <text:p text:style-name="P1165">Plante Totem</text:p>
          </table:table-cell>
          <table:table-cell table:style-name="TableCell1166">
            <text:p text:style-name="P1167">Bibliothèque</text:p>
          </table:table-cell>
        </table:table-row>
        <table:table-row table:style-name="TableRow1168">
          <table:table-cell table:style-name="TableCell1169">
            <text:p text:style-name="P1170"><text:span text:style-name="T1171">en</text:span></text:p>
          </table:table-cell>
          <table:table-cell table:style-name="TableCell1172">
            <text:p text:style-name="P1173">English</text:p>
          </table:table-cell>
          <table:table-cell table:style-name="TableCell1174">
            <text:p text:style-name="P1175">Plants</text:p>
          </table:table-cell>
          <table:table-cell table:style-name="TableCell1176">
            <text:p text:style-name="P1177">Totem Plant</text:p>
          </table:table-cell>
          <table:table-cell table:style-name="TableCell1178">
            <text:p text:style-name="P1179">Library</text:p>
          </table:table-cell>
        </table:table-row>
        <table:table-row table:style-name="TableRow1180">
          <table:table-cell table:style-name="TableCell1181">
            <text:p text:style-name="P1182"><text:span text:style-name="T1183">moore</text:span></text:p>
          </table:table-cell>
          <table:table-cell table:style-name="TableCell1184">
            <text:p text:style-name="P1185">Mooré</text:p>
          </table:table-cell>
          <table:table-cell table:style-name="TableCell1186">
            <text:p text:style-name="P1187">Yiisi</text:p>
          </table:table-cell>
          <table:table-cell table:style-name="TableCell1188">
            <text:p text:style-name="P1189">Yiiga totem</text:p>
          </table:table-cell>
          <table:table-cell table:style-name="TableCell1190">
            <text:p text:style-name="P1191">Sebr</text:p>
          </table:table-cell>
        </table:table-row>
        <table:table-row table:style-name="TableRow1192">
          <table:table-cell table:style-name="TableCell1193">
            <text:p text:style-name="P1194"><text:span text:style-name="T1195">dioula</text:span></text:p>
          </table:table-cell>
          <table:table-cell table:style-name="TableCell1196">
            <text:p text:style-name="P1197">Dioula</text:p>
          </table:table-cell>
          <table:table-cell table:style-name="TableCell1198">
            <text:p text:style-name="P1199">Tigiw</text:p>
          </table:table-cell>
          <table:table-cell table:style-name="TableCell1200">
            <text:p text:style-name="P1201">Tigi totem</text:p>
          </table:table-cell>
          <table:table-cell table:style-name="TableCell1202">
            <text:p text:style-name="P1203"><text:span text:style-name="T1204">J</text:span><text:span text:style-name="T1205">ɔ</text:span><text:span text:style-name="T1206">y</text:span><text:span text:style-name="T1207">ɔ</text:span><text:span text:style-name="T1208">r</text:span><text:span text:style-name="T1209">ɔ</text:span></text:p>
          </table:table-cell>
        </table:table-row>
        <table:table-row table:style-name="TableRow1210">
          <table:table-cell table:style-name="TableCell1211">
            <text:p text:style-name="P1212"><text:span text:style-name="T1213">fulfude</text:span></text:p>
          </table:table-cell>
          <table:table-cell table:style-name="TableCell1214">
            <text:p text:style-name="P1215">Fulfuldé</text:p>
          </table:table-cell>
          <table:table-cell table:style-name="TableCell1216">
            <text:p text:style-name="P1217"><text:span text:style-name="T1218">Le</text:span><text:span text:style-name="T1219">ɗɗ</text:span><text:span text:style-name="T1220">e</text:span></text:p>
          </table:table-cell>
          <table:table-cell table:style-name="TableCell1221">
            <text:p text:style-name="P1222"><text:span text:style-name="T1223">Le</text:span><text:span text:style-name="T1224">ɗɗ</text:span><text:span text:style-name="T1225">e totem</text:span></text:p>
          </table:table-cell>
          <table:table-cell table:style-name="TableCell1226">
            <text:p text:style-name="P1227">Liggital</text:p>
          </table:table-cell>
        </table:table-row>
      </table:table>
      <text:p text:style-name="P1228">Clés i18n à traduire (même structure que l'app Animaux) :</text:p>
      <text:p text:style-name="P1229"><text:span text:style-name="T1230">const</text:span><text:span text:style-name="T1231"><text:s/>keys<text:s/></text:span><text:span text:style-name="T1232">=</text:span><text:span text:style-name="T1233"><text:s/>{</text:span></text:p>
      <text:p text:style-name="P1234"><text:span text:style-name="T1235"><text:s text:c="2"/></text:span><text:span text:style-name="T1236">tabs</text:span><text:span text:style-name="T1237">: {<text:s/></text:span><text:span text:style-name="T1238">home</text:span><text:span text:style-name="T1239">,<text:s/></text:span><text:span text:style-name="T1240">library</text:span><text:span text:style-name="T1241">,<text:s/></text:span><text:span text:style-name="T1242">knowledge</text:span><text:span text:style-name="T1243">,<text:s/></text:span><text:span text:style-name="T1244">myTotem</text:span><text:span text:style-name="T1245">,<text:s/></text:span><text:span text:style-name="T1246">quiz</text:span><text:span text:style-name="T1247">,<text:s/></text:span><text:span text:style-name="T1248">profile</text:span><text:span text:style-name="T1249"><text:s/>},</text:span></text:p>
      <text:p text:style-name="P1250"><text:span text:style-name="T1251"><text:s text:c="2"/></text:span><text:span text:style-name="T1252">home</text:span><text:span text:style-name="T1253">: {<text:s/></text:span><text:span text:style-name="T1254">welcome</text:span><text:span text:style-name="T1255">,<text:s/></text:span><text:span text:style-name="T1256">quoteOfDay</text:span><text:span text:style-name="T1257">,<text:s/></text:span><text:span text:style-name="T1258">stats</text:span><text:span text:style-name="T1259">,<text:s/></text:span><text:span text:style-name="T1260">startQuiz</text:span><text:span text:style-name="T1261">,<text:s/></text:span><text:span text:style-name="T1262">exploreLibrary</text:span><text:span text:style-name="T1263"><text:s/>},</text:span></text:p>
      <text:p text:style-name="P1264"><text:span text:style-name="T1265"><text:s text:c="2"/></text:span><text:span text:style-name="T1266">library</text:span><text:span text:style-name="T1267">: {<text:s/></text:span><text:span text:style-name="T1268">search</text:span><text:span text:style-name="T1269">,<text:s/></text:span><text:span text:style-name="T1270">filterByCategory</text:span><text:span text:style-name="T1271">,<text:s/></text:span><text:span text:style-name="T1272">filterByElement</text:span><text:span text:style-name="T1273"><text:s/>},</text:span></text:p>
      <text:p text:style-name="P1274"><text:span text:style-name="T1275"><text:s text:c="2"/></text:span><text:span text:style-name="T1276">quiz</text:span><text:span text:style-name="T1277">: {<text:s/></text:span><text:span text:style-name="T1278">title</text:span><text:span text:style-name="T1279">,<text:s/></text:span><text:span text:style-name="T1280">question</text:span><text:span text:style-name="T1281">,<text:s/></text:span><text:span text:style-name="T1282">reveal</text:span><text:span text:style-name="T1283">,<text:s/></text:span><text:span text:style-name="T1284">restart</text:span><text:span text:style-name="T1285"><text:s/>},</text:span></text:p>
      <text:p text:style-name="P1286"><text:span text:style-name="T1287"><text:s text:c="2"/></text:span><text:span text:style-name="T1288">detail</text:span><text:span text:style-name="T1289">: {<text:s/></text:span><text:span text:style-name="T1290">qualities</text:span><text:span text:style-name="T1291">,<text:s/></text:span><text:span text:style-name="T1292">flaws</text:span><text:span text:style-name="T1293">,<text:s/></text:span><text:span text:style-name="T1294">powers</text:span><text:span text:style-name="T1295">,<text:s/></text:span><text:span text:style-name="T1296">teachings</text:span><text:span text:style-name="T1297">,<text:s/></text:span><text:span text:style-name="T1298">proverbs</text:span><text:span text:style-name="T1299">,<text:s/></text:span><text:span text:style-name="T1300">legends</text:span><text:span text:style-name="T1301">,<text:s/></text:span><text:span text:style-name="T1302">lifeAdvice</text:span><text:span text:style-name="T1303"><text:s/>},</text:span></text:p>
      <text:p text:style-name="P1304"><text:span text:style-name="T1305"><text:s text:c="2"/></text:span><text:span text:style-name="T1306">chat</text:span><text:span text:style-name="T1307">: {<text:s/></text:span><text:span text:style-name="T1308">placeholder</text:span><text:span text:style-name="T1309">,<text:s/></text:span><text:span text:style-name="T1310">send</text:span><text:span text:style-name="T1311">,<text:s/></text:span><text:span text:style-name="T1312">newConversation</text:span><text:span text:style-name="T1313"><text:s/>},</text:span></text:p>
      <text:p text:style-name="P1314"><text:span text:style-name="T1315"><text:s text:c="2"/></text:span><text:span text:style-name="T1316">profile</text:span><text:span text:style-name="T1317">: {<text:s/></text:span><text:span text:style-name="T1318">favorites</text:span><text:span text:style-name="T1319">,<text:s/></text:span><text:span text:style-name="T1320">language</text:span><text:span text:style-name="T1321">,<text:s/></text:span><text:span text:style-name="T1322">logout</text:span><text:span text:style-name="T1323"><text:s/>},</text:span></text:p>
      <text:p text:style-name="P1324"><text:span text:style-name="T1325"><text:s text:c="2"/></text:span><text:span text:style-name="T1326">elements</text:span><text:span text:style-name="T1327">: {<text:s/></text:span><text:span text:style-name="T1328">Fire</text:span><text:span text:style-name="T1329">,<text:s/></text:span><text:span text:style-name="T1330">Water</text:span><text:span text:style-name="T1331">,<text:s/></text:span><text:span text:style-name="T1332">Earth</text:span><text:span text:style-name="T1333">,<text:s/></text:span><text:span text:style-name="T1334">Air</text:span><text:span text:style-name="T1335">,<text:s/></text:span><text:span text:style-name="T1336">Wood</text:span><text:span text:style-name="T1337"><text:s/>},</text:span></text:p>
      <text:p text:style-name="P1338"><text:span text:style-name="T1339"><text:s text:c="2"/></text:span><text:span text:style-name="T1340">categories</text:span><text:span text:style-name="T1341">: {<text:s/></text:span><text:span text:style-name="T1342">sacredTrees</text:span><text:span text:style-name="T1343">,<text:s/></text:span><text:span text:style-name="T1344">medicinalPlants</text:span><text:span text:style-name="T1345">,<text:s/></text:span><text:span text:style-name="T1346">ritualHerbs</text:span><text:span text:style-name="T1347">,<text:s/></text:span><text:span text:style-name="T1348">vines</text:span><text:span text:style-name="T1349">,<text:s/></text:span><text:span text:style-name="T1350">aquaticPlants</text:span><text:span text:style-name="T1351"><text:s/>},</text:span></text:p>
      <text:p text:style-name="P1352">};</text:p>
      <text:soft-page-break/>
      <text:p text:style-name="P1353"><text:span text:style-name="T1354"><draw:custom-shape svg:x="0in" svg:y="0in" svg:width="0in" svg:height="0.01042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P1355" text:outline-level="2"><text:span text:style-name="T1356">🖼️</text:span><text:span text:style-name="T1357"><text:s/>Assets à produire</text:span></text:h>
      <text:h text:style-name="P1358" text:outline-level="3">Images</text:h>
      <text:list text:style-name="LFO1" text:continue-numbering="true">
        <text:list-item>
          <text:p text:style-name="P1359"><text:span text:style-name="T1360">40-60 PNG</text:span><text:span text:style-name="T1361"> des plantes (fond noir/sombre, style illustratif cohérent)</text:span></text:p>
        </text:list-item>
        <text:list-item>
          <text:p text:style-name="P1362">Format recommandé : 512×512px, fond transparent ou noir</text:p>
        </text:list-item>
        <text:list-item>
          <text:p text:style-name="P1363"><text:span text:style-name="T1364">Convention de nommage : </text:span><text:span text:style-name="T1365">ASCII uniquement</text:span><text:span text:style-name="T1366"> (ex: </text:span><text:span text:style-name="T1367">baobab.png</text:span><text:span text:style-name="T1368">, </text:span><text:span text:style-name="T1369">kinkeliba.png</text:span><text:span text:style-name="T1370">, </text:span><text:span text:style-name="T1371">poivre-selim.png</text:span><text:span text:style-name="T1372">)</text:span></text:p>
        </text:list-item>
        <text:list-item>
          <text:p text:style-name="P1373"><text:span text:style-name="T1374">⚠️</text:span><text:span text:style-name="T1375"> </text:span><text:span text:style-name="T1376">Aucun caractère accentué dans les noms de fichiers</text:span></text:p>
        </text:list-item>
      </text:list>
      <text:h text:style-name="P1377" text:outline-level="3">Icône &amp; Splash</text:h>
      <text:list text:style-name="LFO2" text:continue-numbering="true">
        <text:list-item>
          <text:p text:style-name="P1378">Icône app : feuille stylisée ou Baobab sacré</text:p>
        </text:list-item>
        <text:list-item>
          <text:p text:style-name="P1379"><text:span text:style-name="T1380">Splash screen : fond vert profond (</text:span><text:span text:style-name="T1381">#0A1F0A</text:span><text:span text:style-name="T1382">), titre doré</text:span></text:p>
        </text:list-item>
      </text:list>
      <text:h text:style-name="P1383" text:outline-level="3">Sons (optionnel)</text:h>
      <text:p text:style-name="P1384">Sons d'ambiance par élément (stream depuis Wikimedia Commons ou intégrés) :</text:p>
      <text:list text:style-name="LFO3" text:continue-numbering="true">
        <text:list-item>
          <text:p text:style-name="P1385"><text:span text:style-name="T1386">Terre<text:s/></text:span><text:span text:style-name="T1387">→</text:span><text:span text:style-name="T1388"><text:s/>sons de tambours, sol, pluie sur terre</text:span></text:p>
        </text:list-item>
        <text:list-item>
          <text:p text:style-name="P1389"><text:span text:style-name="T1390">Eau<text:s/></text:span><text:span text:style-name="T1391">→</text:span><text:span text:style-name="T1392"><text:s/>rivi</text:span><text:span text:style-name="T1393">è</text:span><text:span text:style-name="T1394">re, pluie, ocean</text:span></text:p>
        </text:list-item>
        <text:list-item>
          <text:p text:style-name="P1395"><text:span text:style-name="T1396">Feu<text:s/></text:span><text:span text:style-name="T1397">→</text:span><text:span text:style-name="T1398"><text:s/>cr</text:span><text:span text:style-name="T1399">é</text:span><text:span text:style-name="T1400">pitement de feu</text:span></text:p>
        </text:list-item>
        <text:list-item>
          <text:p text:style-name="P1401"><text:span text:style-name="T1402">Air<text:s/></text:span><text:span text:style-name="T1403">→</text:span><text:span text:style-name="T1404"><text:s/>vent dans les feuilles</text:span></text:p>
        </text:list-item>
        <text:list-item>
          <text:p text:style-name="P1405"><text:span text:style-name="T1406">Bois<text:s/></text:span><text:span text:style-name="T1407">→</text:span><text:span text:style-name="T1408"><text:s/>for</text:span><text:span text:style-name="T1409">ê</text:span><text:span text:style-name="T1410">t, branchages, oiseaux</text:span></text:p>
        </text:list-item>
      </text:list>
      <text:p text:style-name="P1411"><text:span text:style-name="T1412"><draw:custom-shape svg:x="0in" svg:y="0in" svg:width="0in" svg:height="0.01042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P1413" text:outline-level="2"><text:span text:style-name="T1414">🔄</text:span><text:span text:style-name="T1415"><text:s/>Tableau des différences : Animaux<text:s/></text:span><text:span text:style-name="T1416">→</text:span><text:span text:style-name="T1417"><text:s/>Plantes</text:span></text:h>
      <table:table table:style-name="Table1418">
        <table:table-columns>
          <table:table-column table:style-name="TableColumn1419"/>
          <table:table-column table:style-name="TableColumn1420"/>
          <table:table-column table:style-name="TableColumn1421"/>
        </table:table-columns>
        <table:table-header-rows>
          <table:table-row table:style-name="TableRow1422">
            <table:table-cell table:style-name="TableCell1423">
              <text:p text:style-name="P1424">Aspect</text:p>
            </table:table-cell>
            <table:table-cell table:style-name="TableCell1425">
              <text:p text:style-name="P1426">Animaux Sacrés</text:p>
            </table:table-cell>
            <table:table-cell table:style-name="TableCell1427">
              <text:p text:style-name="P1428">Plantes Sacrées</text:p>
            </table:table-cell>
          </table:table-row>
        </table:table-header-rows>
        <table:table-row table:style-name="TableRow1429">
          <table:table-cell table:style-name="TableCell1430">
            <text:p text:style-name="P1431">Type principal</text:p>
          </table:table-cell>
          <table:table-cell table:style-name="TableCell1432">
            <text:p text:style-name="P1433"><text:span text:style-name="T1434">Animal</text:span></text:p>
          </table:table-cell>
          <table:table-cell table:style-name="TableCell1435">
            <text:p text:style-name="P1436"><text:span text:style-name="T1437">Plante</text:span></text:p>
          </table:table-cell>
        </table:table-row>
        <table:table-row table:style-name="TableRow1438">
          <table:table-cell table:style-name="TableCell1439">
            <text:p text:style-name="P1440">Champ unique</text:p>
          </table:table-cell>
          <table:table-cell table:style-name="TableCell1441">
            <text:p text:style-name="P1442">—</text:p>
          </table:table-cell>
          <table:table-cell table:style-name="TableCell1443">
            <text:p text:style-name="P1444"><text:span text:style-name="T1445">usagesMedicinaux</text:span><text:span text:style-name="T1446">, </text:span><text:span text:style-name="T1447">partiesUtilisees</text:span><text:span text:style-name="T1448">, </text:span><text:span text:style-name="T1449">habitat</text:span><text:span text:style-name="T1450">, </text:span><text:span text:style-name="T1451">peuplesConcernes</text:span></text:p>
          </table:table-cell>
        </table:table-row>
        <table:table-row table:style-name="TableRow1452">
          <table:table-cell table:style-name="TableCell1453">
            <text:p text:style-name="P1454">Sons</text:p>
          </table:table-cell>
          <table:table-cell table:style-name="TableCell1455">
            <text:p text:style-name="P1456">Cris d'animaux (Wikimedia)</text:p>
          </table:table-cell>
          <table:table-cell table:style-name="TableCell1457">
            <text:p text:style-name="P1458">Ambiances naturelles par élément</text:p>
          </table:table-cell>
        </table:table-row>
        <table:table-row table:style-name="TableRow1459">
          <table:table-cell table:style-name="TableCell1460">
            <text:p text:style-name="P1461">Catégories</text:p>
          </table:table-cell>
          <table:table-cell table:style-name="TableCell1462">
            <text:p text:style-name="P1463">Mammifères, Oiseaux, Reptiles…</text:p>
          </table:table-cell>
          <table:table-cell table:style-name="TableCell1464">
            <text:p text:style-name="P1465">Arbres, Herbes, Lianes…</text:p>
          </table:table-cell>
        </table:table-row>
        <table:table-row table:style-name="TableRow1466">
          <table:table-cell table:style-name="TableCell1467">
            <text:p text:style-name="P1468">5e élément</text:p>
          </table:table-cell>
          <table:table-cell table:style-name="TableCell1469">
            <text:p text:style-name="P1470">—</text:p>
          </table:table-cell>
          <table:table-cell table:style-name="TableCell1471">
            <text:p text:style-name="P1472"><text:span text:style-name="T1473">Bois</text:span></text:p>
          </table:table-cell>
        </table:table-row>
        <text:soft-page-break/>
        <table:table-row table:style-name="TableRow1474">
          <table:table-cell table:style-name="TableCell1475">
            <text:p text:style-name="P1476">Couleur de base UI</text:p>
          </table:table-cell>
          <table:table-cell table:style-name="TableCell1477">
            <text:p text:style-name="P1478"><text:span text:style-name="T1479">Brun savane </text:span><text:span text:style-name="T1480">#120A05</text:span></text:p>
          </table:table-cell>
          <table:table-cell table:style-name="TableCell1481">
            <text:p text:style-name="P1482"><text:span text:style-name="T1483">Vert forêt </text:span><text:span text:style-name="T1484">#0A1F0A</text:span></text:p>
          </table:table-cell>
        </table:table-row>
        <table:table-row table:style-name="TableRow1485">
          <table:table-cell table:style-name="TableCell1486">
            <text:p text:style-name="P1487">Dimensions totem</text:p>
          </table:table-cell>
          <table:table-cell table:style-name="TableCell1488">
            <text:p text:style-name="P1489">E / O / C / A / S (Big Five)</text:p>
          </table:table-cell>
          <table:table-cell table:style-name="TableCell1490">
            <text:p text:style-name="P1491">R / F / G / L / C</text:p>
          </table:table-cell>
        </table:table-row>
        <table:table-row table:style-name="TableRow1492">
          <table:table-cell table:style-name="TableCell1493">
            <text:p text:style-name="P1494">Onglet bibliothèque</text:p>
          </table:table-cell>
          <table:table-cell table:style-name="TableCell1495">
            <text:p text:style-name="P1496">"Animaux"</text:p>
          </table:table-cell>
          <table:table-cell table:style-name="TableCell1497">
            <text:p text:style-name="P1498">"Plantes"</text:p>
          </table:table-cell>
        </table:table-row>
        <table:table-row table:style-name="TableRow1499">
          <table:table-cell table:style-name="TableCell1500">
            <text:p text:style-name="P1501">Onglet totem</text:p>
          </table:table-cell>
          <table:table-cell table:style-name="TableCell1502">
            <text:p text:style-name="P1503">"Mon Animal"</text:p>
          </table:table-cell>
          <table:table-cell table:style-name="TableCell1504">
            <text:p text:style-name="P1505">"Ma Plante"</text:p>
          </table:table-cell>
        </table:table-row>
        <table:table-row table:style-name="TableRow1506">
          <table:table-cell table:style-name="TableCell1507">
            <text:p text:style-name="P1508">Route détail</text:p>
          </table:table-cell>
          <table:table-cell table:style-name="TableCell1509">
            <text:p text:style-name="P1510"><text:span text:style-name="T1511">animal/[id]</text:span></text:p>
          </table:table-cell>
          <table:table-cell table:style-name="TableCell1512">
            <text:p text:style-name="P1513"><text:span text:style-name="T1514">plant/[id]</text:span></text:p>
          </table:table-cell>
        </table:table-row>
        <table:table-row table:style-name="TableRow1515">
          <table:table-cell table:style-name="TableCell1516">
            <text:p text:style-name="P1517">Chat IA</text:p>
          </table:table-cell>
          <table:table-cell table:style-name="TableCell1518">
            <text:p text:style-name="P1519">"Ton totem animal te parle"</text:p>
          </table:table-cell>
          <table:table-cell table:style-name="TableCell1520">
            <text:p text:style-name="P1521">"Ta plante totem te murmure"</text:p>
          </table:table-cell>
        </table:table-row>
        <table:table-row table:style-name="TableRow1522">
          <table:table-cell table:style-name="TableCell1523">
            <text:p text:style-name="P1524">Image ANIMAL_IMAGES</text:p>
          </table:table-cell>
          <table:table-cell table:style-name="TableCell1525">
            <text:p text:style-name="P1526"><text:span text:style-name="T1527">ANIMAL_IMAGES</text:span><text:span text:style-name="T1528"> dict</text:span></text:p>
          </table:table-cell>
          <table:table-cell table:style-name="TableCell1529">
            <text:p text:style-name="P1530"><text:span text:style-name="T1531">PLANT_IMAGES</text:span><text:span text:style-name="T1532"> dict</text:span></text:p>
          </table:table-cell>
        </table:table-row>
      </table:table>
      <text:p text:style-name="P1533"><text:span text:style-name="T1534"><draw:custom-shape svg:x="0in" svg:y="0in" svg:width="0in" svg:height="0.01042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span></text:p>
      <text:h text:style-name="P1535" text:outline-level="2"><text:span text:style-name="T1536">📋</text:span><text:span text:style-name="T1537"><text:s/>Checklist de développement</text:span></text:h>
      <text:h text:style-name="P1538" text:outline-level="3">Phase 1 — Données</text:h>
      <text:list text:style-name="LFO4" text:continue-numbering="true">
        <text:list-item>
          <text:p text:style-name="P1539"><text:span text:style-name="T1540"> Créer </text:span><text:span text:style-name="T1541">data/plants.ts</text:span><text:span text:style-name="T1542"> avec la liste complète (40+ plantes)</text:span></text:p>
        </text:list-item>
        <text:list-item>
          <text:p text:style-name="P1543"><text:span text:style-name="T1544"> Créer </text:span><text:span text:style-name="T1545">data/quiz.ts</text:span><text:span text:style-name="T1546"> avec 20 questions + mapping totem</text:span></text:p>
        </text:list-item>
        <text:list-item>
          <text:p text:style-name="P1547"><text:span text:style-name="T1548"> Créer </text:span><text:span text:style-name="T1549">data/quotes.ts</text:span><text:span text:style-name="T1550"> avec citations des plantes</text:span></text:p>
        </text:list-item>
        <text:list-item>
          <text:p text:style-name="P1551"><text:span text:style-name="T1552"> Créer </text:span><text:span text:style-name="T1553">data/knowledge.ts</text:span><text:span text:style-name="T1554"> avec chapitres sur les traditions végétales</text:span></text:p>
        </text:list-item>
      </text:list>
      <text:h text:style-name="P1555" text:outline-level="3">Phase 2 — UI</text:h>
      <text:list text:style-name="LFO5" text:continue-numbering="true">
        <text:list-item>
          <text:p text:style-name="P1556"><text:span text:style-name="T1557"> Adapter </text:span><text:span text:style-name="T1558">constants/colors.ts</text:span><text:span text:style-name="T1559"> (palette verte)</text:span></text:p>
        </text:list-item>
        <text:list-item>
          <text:p text:style-name="P1560"><text:span text:style-name="T1561"> Créer </text:span><text:span text:style-name="T1562">components/PlantCard.tsx</text:span><text:span text:style-name="T1563"> (basé sur AnimalCard)</text:span></text:p>
        </text:list-item>
        <text:list-item>
          <text:p text:style-name="P1564"><text:span text:style-name="T1565"> Adapter </text:span><text:span text:style-name="T1566">app/(tabs)/plantes.tsx</text:span><text:span text:style-name="T1567"> (basé sur animaux.tsx)</text:span></text:p>
        </text:list-item>
        <text:list-item>
          <text:p text:style-name="P1568"><text:span text:style-name="T1569"> Adapter </text:span><text:span text:style-name="T1570">app/plant/[id].tsx</text:span><text:span text:style-name="T1571"> (basé sur animal/[id].tsx)</text:span></text:p>
        </text:list-item>
        <text:list-item>
          <text:p text:style-name="P1572"><text:span text:style-name="T1573"> Adapter </text:span><text:span text:style-name="T1574">app/(tabs)/ma-plante.tsx</text:span><text:span text:style-name="T1575"> (basé sur mon-animal.tsx)</text:span></text:p>
        </text:list-item>
        <text:list-item>
          <text:p text:style-name="P1576"><text:span text:style-name="T1577"> Adapter </text:span><text:span text:style-name="T1578">app/chat-plante.tsx</text:span><text:span text:style-name="T1579"> (basé sur chat-totem.tsx)</text:span></text:p>
        </text:list-item>
      </text:list>
      <text:h text:style-name="P1580" text:outline-level="3">Phase 3 — Backend</text:h>
      <text:list text:style-name="LFO6" text:continue-numbering="true">
        <text:list-item>
          <text:p text:style-name="P1581"><text:span text:style-name="T1582"> Adapter la route </text:span><text:span text:style-name="T1583">/chat/totem</text:span><text:span text:style-name="T1584"> </text:span><text:span text:style-name="T1585">→</text:span><text:span text:style-name="T1586"> </text:span><text:span text:style-name="T1587">/chat/plante</text:span><text:span text:style-name="T1588"> avec nouveau prompt</text:span></text:p>
        </text:list-item>
        <text:list-item>
          <text:p text:style-name="P1589"> Vérifier le schéma DB (users, sessions — identique)</text:p>
        </text:list-item>
      </text:list>
      <text:h text:style-name="P1590" text:outline-level="3">Phase 4 — Assets</text:h>
      <text:soft-page-break/>
      <text:list text:style-name="LFO7" text:continue-numbering="true">
        <text:list-item>
          <text:p text:style-name="P1591"> Générer/illustrer 40+ images PNG (ASCII filenames)</text:p>
        </text:list-item>
        <text:list-item>
          <text:p text:style-name="P1592"> Créer l'icône app et le splash screen</text:p>
        </text:list-item>
        <text:list-item>
          <text:p text:style-name="P1593"> Optionnel : préparer les sons par élément</text:p>
        </text:list-item>
      </text:list>
      <text:h text:style-name="P1594" text:outline-level="3">Phase 5 — i18n</text:h>
      <text:list text:style-name="LFO8" text:continue-numbering="true">
        <text:list-item>
          <text:p text:style-name="P1595"> Traduire toutes les clés en FR, EN, Mooré, Dioula, Fulfuldé</text:p>
        </text:list-item>
      </text:list>
      <text:h text:style-name="P1596" text:outline-level="3">Phase 6 — Build</text:h>
      <text:list text:style-name="LFO9" text:continue-numbering="true">
        <text:list-item>
          <text:p text:style-name="P1597"><text:span text:style-name="T1598"> Configurer </text:span><text:span text:style-name="T1599">eas.json</text:span><text:span text:style-name="T1600"> (identique)</text:span></text:p>
        </text:list-item>
        <text:list-item>
          <text:p text:style-name="P1601"><text:span text:style-name="T1602"> Configurer </text:span><text:span text:style-name="T1603">metro.config.js</text:span><text:span text:style-name="T1604"> (identique, avec blockList mockup-sandbox)</text:span></text:p>
        </text:list-item>
        <text:list-item>
          <text:p text:style-name="P1605"> Build APK preview via EAS</text:p>
        </text:list-item>
        <text:list-item>
          <text:p text:style-name="P1606"> Déploiement Railway</text:p>
        </text:list-item>
      </text:list>
      <text:p text:style-name="P1607"><text:span text:style-name="T1608"><draw:custom-shape svg:x="0in" svg:y="0in" svg:width="0in" svg:height="0.01042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span></text:p>
      <text:h text:style-name="P1609" text:outline-level="2"><text:span text:style-name="T1610">⚠️</text:span><text:span text:style-name="T1611"><text:s/>Points d'attention techniques (le</text:span><text:span text:style-name="T1612">ç</text:span><text:span text:style-name="T1613">ons apprises)</text:span></text:h>
      <text:list text:style-name="LFO10" text:continue-numbering="true">
        <text:list-item>
          <text:p text:style-name="P1614"><text:span text:style-name="T1615">Noms de fichiers images</text:span><text:span text:style-name="T1616"> : utiliser uniquement des caractères ASCII. Pas de </text:span><text:span text:style-name="T1617">é</text:span><text:span text:style-name="T1618">, </text:span><text:span text:style-name="T1619">è</text:span><text:span text:style-name="T1620">, </text:span><text:span text:style-name="T1621">â</text:span><text:span text:style-name="T1622">, etc. dans les noms de fichiers PNG. Les références dans le code peuvent utiliser des accents (clés JS), mais le fichier sur disque doit être ASCII (ex: </text:span><text:span text:style-name="T1623">kinkeliba.png</text:span><text:span text:style-name="T1624">, pas </text:span><text:span text:style-name="T1625">kinkelibà.png</text:span><text:span text:style-name="T1626">).</text:span></text:p>
        </text:list-item>
        <text:list-item>
          <text:p text:style-name="P1627"><text:span text:style-name="T1628">Lockfile pnpm</text:span><text:span text:style-name="T1629"> : après tout changement de version de dépendance, régénérer le lockfile localement avant de pousser. Railway utilise </text:span><text:span text:style-name="T1630">--frozen-lockfile</text:span><text:span text:style-name="T1631">.</text:span></text:p>
        </text:list-item>
        <text:list-item>
          <text:p text:style-name="P1632"><text:span text:style-name="T1633">expo-audio</text:span><text:span text:style-name="T1634"> : utiliser la version </text:span><text:span text:style-name="T1635">~1.1.1</text:span><text:span text:style-name="T1636"> (compatible Expo SDK 54). Ne pas utiliser </text:span><text:span text:style-name="T1637">expo-av</text:span><text:span text:style-name="T1638"> simultanément.</text:span></text:p>
        </text:list-item>
        <text:list-item>
          <text:p text:style-name="P1639"><text:span text:style-name="T1640">Metro + monorepo</text:span><text:span text:style-name="T1641"> : ajouter dans </text:span><text:span text:style-name="T1642">metro.config.js</text:span><text:span text:style-name="T1643"> un </text:span><text:span text:style-name="T1644">blockList</text:span><text:span text:style-name="T1645"> excluant le répertoire </text:span><text:span text:style-name="T1646">mockup-sandbox</text:span><text:span text:style-name="T1647"> pour éviter les crashes du watcher.</text:span></text:p>
        </text:list-item>
        <text:list-item>
          <text:p text:style-name="P1648"><text:span text:style-name="T1649">React Compiler</text:span><text:span text:style-name="T1650"> : activé par défaut dans Expo SDK 54. Si des erreurs de compilation apparaissent en production iOS, vérifier les hooks complexes.</text:span></text:p>
        </text:list-item>
        <text:list-item>
          <text:p text:style-name="P1651"><text:span text:style-name="T1652">GROQ_API_KEY</text:span><text:span text:style-name="T1653"> : variable d'environnement obligatoire pour le serveur API. À configurer dans Railway et dans Replit Secrets.</text:span></text:p>
        </text:list-item>
      </text:list>
      <text:p text:style-name="P1654"><text:span text:style-name="T1655"><draw:custom-shape svg:x="0in" svg:y="0in" svg:width="0in" svg:height="0.01042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P1656"><text:span text:style-name="T1657">Document généré depuis l'app "Les Animaux Sacrés de l'Afrique de l'Ouest" — Juin 2026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IBM Plex Sans" svg:font-family="IBM Plex San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codeviewer2-module___y4kcw__span" style:display-name="codeviewer2-module___y4kcw__span" style:family="text" style:parent-style-name="Policepardéfaut"/>
    <style:style style:name="task-list-item" style:display-name="task-list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scretestuds@outlook.com</meta:initial-creator>
    <dc:creator>discretestuds@outlook.com</dc:creator>
    <meta:creation-date>2026-06-21T09:35:00Z</meta:creation-date>
    <dc:date>2026-06-21T09:37:00Z</dc:date>
    <meta:template xlink:href="Normal.dotm" xlink:type="simple"/>
    <meta:editing-cycles>1</meta:editing-cycles>
    <meta:editing-duration>PT120S</meta:editing-duration>
    <meta:document-statistic meta:page-count="10" meta:paragraph-count="25" meta:word-count="1950" meta:character-count="12655" meta:row-count="89" meta:non-whitespace-character-count="10730"/>
  </office:meta>
</office:document-meta>
</file>